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number text:level="1" text:style-name="Numbering_20_Symbols" style:num-format="1" text:start-value="1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8">
      <style:paragraph-properties fo:margin-top="0in" fo:margin-bottom="0in"/>
    </style:style>
    <style:style style:name="P30" style:family="paragraph" style:parent-style-name="Text_20_body" style:list-style-name="L9">
      <style:paragraph-properties fo:margin-top="0in" fo:margin-bottom="0in"/>
    </style:style>
    <style:style style:name="P31" style:family="paragraph" style:parent-style-name="Text_20_body" style:list-style-name="L10">
      <style:paragraph-properties fo:margin-top="0in" fo:margin-bottom="0in"/>
    </style:style>
    <style:style style:name="P32" style:family="paragraph" style:parent-style-name="Text_20_body" style:list-style-name="L11">
      <style:paragraph-properties fo:margin-top="0in" fo:margin-bottom="0in"/>
    </style:style>
    <style:style style:name="P33" style:family="paragraph" style:parent-style-name="Text_20_body" style:list-style-name="L1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13">
      <style:paragraph-properties fo:margin-top="0in" fo:margin-bottom="0in"/>
    </style:style>
    <style:style style:name="P90" style:family="paragraph" style:parent-style-name="Text_20_body" style:list-style-name="L14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15">
      <style:paragraph-properties fo:margin-top="0in" fo:margin-bottom="0in"/>
    </style:style>
    <style:style style:name="P100" style:family="paragraph" style:parent-style-name="Text_20_body" style:list-style-name="L16">
      <style:paragraph-properties fo:margin-top="0in" fo:margin-bottom="0in"/>
    </style:style>
    <style:style style:name="P101" style:family="paragraph" style:parent-style-name="Text_20_body" style:list-style-name="L17">
      <style:paragraph-properties fo:margin-top="0in" fo:margin-bottom="0in"/>
    </style:style>
    <style:style style:name="P102" style:family="paragraph" style:parent-style-name="Text_20_body" style:list-style-name="L18">
      <style:paragraph-properties fo:margin-top="0in" fo:margin-bottom="0in"/>
    </style:style>
    <style:style style:name="P103" style:family="paragraph" style:parent-style-name="Text_20_body" style:list-style-name="L19">
      <style:paragraph-properties fo:margin-top="0in" fo:margin-bottom="0in"/>
    </style:style>
    <style:style style:name="P104" style:family="paragraph" style:parent-style-name="Text_20_body" style:list-style-name="L20">
      <style:paragraph-properties fo:margin-top="0in" fo:margin-bottom="0in"/>
    </style:style>
    <style:style style:name="P105" style:family="paragraph" style:parent-style-name="Text_20_body" style:list-style-name="L21">
      <style:paragraph-properties fo:margin-top="0in" fo:margin-bottom="0in"/>
    </style:style>
    <style:style style:name="P106" style:family="paragraph" style:parent-style-name="Text_20_body" style:list-style-name="L22">
      <style:paragraph-properties fo:margin-top="0in" fo:margin-bottom="0in"/>
    </style:style>
    <style:style style:name="P107" style:family="paragraph" style:parent-style-name="Text_20_body" style:list-style-name="L23">
      <style:paragraph-properties fo:margin-top="0in" fo:margin-bottom="0in"/>
    </style:style>
    <style:style style:name="P108" style:family="paragraph" style:parent-style-name="Text_20_body" style:list-style-name="L24">
      <style:paragraph-properties fo:margin-top="0in" fo:margin-bottom="0in"/>
    </style:style>
    <style:style style:name="P109" style:family="paragraph" style:parent-style-name="Text_20_body" style:list-style-name="L25">
      <style:paragraph-properties fo:margin-top="0in" fo:margin-bottom="0in"/>
    </style:style>
    <style:style style:name="P11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esign-patterns-used-in-the-libraryapp-project"/>Design Patterns Used in the LibraryApp Project<text:bookmark-end text:name="design-patterns-used-in-the-libraryapp-project"/></text:h>
      <text:p text:style-name="First_20_paragraph">Prepared on: 2026-04-02</text:p>
      <text:p text:style-name="Text_20_body">Project scanned: - <text:span text:style-name="Source_Text">client/</text:span> - Flutter mobile/web client - <text:span text:style-name="Source_Text">server/</text:span> - FastAPI backend - <text:span text:style-name="Source_Text">admin/</text:span> - Next.js admin portal</text:p>
      <text:p text:style-name="Text_20_body">Scope notes: - I focused on real source files and architecture files. - I did not treat generated/build/vendor content as architectural evidence, such as <text:span text:style-name="Source_Text">.g.dart</text:span>, <text:span text:style-name="Source_Text">.dart_tool</text:span>, <text:span text:style-name="Source_Text">.next</text:span>, <text:span text:style-name="Source_Text">node_modules</text:span>, <text:span text:style-name="Source_Text">build</text:span>, and platform-generated files.</text:p>
      <text:h text:style-name="Heading_20_2" text:outline-level="2"><text:bookmark-start text:name="executive-summary"/>1. Executive Summary<text:bookmark-end text:name="executive-summary"/></text:h>
      <text:p text:style-name="First_20_paragraph">This project does not use only one design pattern. It uses a combination of patterns across the client, server, and admin applications.</text:p>
      <text:p text:style-name="Text_20_body">The strongest and most consistent patterns in this codebase are:</text:p>
      <text:list text:style-name="L1">
        <text:list-item>
          <text:p text:style-name="P1">MVVM / ViewModel pattern in the Flutter client</text:p>
        </text:list-item>
        <text:list-item>
          <text:p text:style-name="P1">Repository pattern in the Flutter client</text:p>
        </text:list-item>
        <text:list-item>
          <text:p text:style-name="P1">Observer / reactive state pattern through Riverpod and React Context</text:p>
        </text:list-item>
        <text:list-item>
          <text:p text:style-name="P1">Single source of truth / centralized state store</text:p>
        </text:list-item>
        <text:list-item>
          <text:p text:style-name="P1">Dependency Injection</text:p>
        </text:list-item>
        <text:list-item>
          <text:p text:style-name="P1">Application Factory pattern in the FastAPI backend</text:p>
        </text:list-item>
        <text:list-item>
          <text:p text:style-name="P1">Router / Controller pattern for APIs</text:p>
        </text:list-item>
        <text:list-item>
          <text:p text:style-name="P1">ORM + DTO / Data Mapper style separation on the backend</text:p>
        </text:list-item>
        <text:list-item>
          <text:p text:style-name="P1">Transaction Script pattern in the admin API routes</text:p>
        </text:list-item>
        <text:list-item>
          <text:p text:style-name="P1">Factory and Singleton-like infrastructure helpers</text:p>
        </text:list-item>
      </text:list>
      <text:p text:style-name="First_20_paragraph">There are also a few supporting architectural patterns:</text:p>
      <text:list text:style-name="L2">
        <text:list-item>
          <text:p text:style-name="P2">Layered architecture</text:p>
        </text:list-item>
        <text:list-item>
          <text:p text:style-name="P2">Feature-based modular architecture</text:p>
        </text:list-item>
        <text:list-item>
          <text:p text:style-name="P2">Middleware pipeline</text:p>
        </text:list-item>
        <text:list-item>
          <text:p text:style-name="P2">Layout composition</text:p>
        </text:list-item>
        <text:list-item>
          <text:p text:style-name="P2">Facade / wrapper around external APIs</text:p>
        </text:list-item>
      </text:list>
      <text:h text:style-name="Heading_20_2" text:outline-level="2"><text:bookmark-start text:name="architecture-overview"/>2. Architecture Overview<text:bookmark-end text:name="architecture-overview"/></text:h>
      <text:p text:style-name="First_20_paragraph">At a high level, your system is split like this:</text:p>
      <text:p text:style-name="P3">Flutter Client</text:p>
      <text:p text:style-name="P4"><text:s text:c="2"/>Views -&gt; ViewModels -&gt; Repositories -&gt; Services -&gt; Backend APIs</text:p>
      <text:p text:style-name="P5"/>
      <text:p text:style-name="P6">FastAPI Server</text:p>
      <text:p text:style-name="P7"><text:s text:c="2"/>App Factory -&gt; Routers -&gt; Dependencies -&gt; Models / Schemas -&gt; Database</text:p>
      <text:p text:style-name="P8"/>
      <text:p text:style-name="P9">Next.js Admin</text:p>
      <text:p text:style-name="P10"><text:s text:c="2"/>Layouts / Components -&gt; Route Handlers -&gt; DB Helpers / Auth Helpers</text:p>
      <text:p text:style-name="First_20_paragraph">This structure already shows that the project is layered and modular, not a flat file-by-file app.</text:p>
      <text:h text:style-name="Heading_20_2" text:outline-level="2"><text:bookmark-start text:name="flutter-client-patterns"/>3. Flutter Client Patterns<text:bookmark-end text:name="flutter-client-patterns"/></text:h>
      <text:h text:style-name="Heading_20_2" text:outline-level="2"><text:bookmark-start text:name="mvvm-viewmodel-pattern"/>3.1 MVVM / ViewModel Pattern<text:bookmark-end text:name="mvvm-viewmodel-pattern"/></text:h>
      <text:h text:style-name="Heading_20_3" text:outline-level="3"><text:bookmark-start text:name="what-it-is"/>What it is<text:bookmark-end text:name="what-it-is"/></text:h>
      <text:p text:style-name="First_20_paragraph">MVVM means:</text:p>
      <text:list text:style-name="L3">
        <text:list-item>
          <text:p text:style-name="P11"><text:span text:style-name="Source_Text">View</text:span> handles rendering and UI events</text:p>
        </text:list-item>
        <text:list-item>
          <text:p text:style-name="P11"><text:span text:style-name="Source_Text">ViewModel</text:span> handles state and UI logic</text:p>
        </text:list-item>
        <text:list-item>
          <text:p text:style-name="P11"><text:span text:style-name="Source_Text">Model</text:span> holds the data objects</text:p>
        </text:list-item>
      </text:list>
      <text:h text:style-name="Heading_20_3" text:outline-level="3"><text:bookmark-start text:name="why-your-code-matches-this"/>Why your code matches this<text:bookmark-end text:name="why-your-code-matches-this"/></text:h>
      <text:p text:style-name="First_20_paragraph">Your Flutter features are clearly separated into:</text:p>
      <text:list text:style-name="L4">
        <text:list-item>
          <text:p text:style-name="P12"><text:span text:style-name="Source_Text">views/</text:span></text:p>
        </text:list-item>
        <text:list-item>
          <text:p text:style-name="P12"><text:span text:style-name="Source_Text">viewmodels/</text:span></text:p>
        </text:list-item>
        <text:list-item>
          <text:p text:style-name="P12"><text:span text:style-name="Source_Text">models/</text:span></text:p>
        </text:list-item>
      </text:list>
      <text:p text:style-name="First_20_paragraph">The <text:span text:style-name="Source_Text">View</text:span> listens to state and triggers actions on the <text:span text:style-name="Source_Text">ViewModel</text:span>. The <text:span text:style-name="Source_Text">ViewModel</text:span> loads data, updates state, and handles errors.</text:p>
      <text:h text:style-name="Heading_20_3" text:outline-level="3"><text:bookmark-start text:name="code-evidence"/>Code evidence<text:bookmark-end text:name="code-evidence"/></text:h>
      <text:p text:style-name="First_20_paragraph">File: <text:span text:style-name="Source_Text">client/lib/features/home/views/home_view.dart</text:span></text:p>
      <text:p text:style-name="Preformatted_20_Text">
<text:span text:style-name="KeywordTok">class</text:span><text:span text:style-name="NormalTok"><text:s text:c="1"/>HomeView </text:span><text:span text:style-name="KeywordTok">extends</text:span><text:span text:style-name="NormalTok"><text:s text:c="1"/>ConsumerWidget </text:span><text:span text:style-name="OperatorTok">{</text:span>
</text:p>
      <text:p text:style-name="Preformatted_20_Text">
<text:span text:style-name="NormalTok"><text:s text:c="2"/></text:span><text:span text:style-name="AttributeTok">const</text:span><text:span text:style-name="NormalTok"><text:s text:c="1"/>HomeView(</text:span><text:span text:style-name="OperatorTok">{</text:span><text:span text:style-name="KeywordTok">super</text:span><text:span text:style-name="OperatorTok">.</text:span><text:span text:style-name="NormalTok">key</text:span><text:span text:style-name="OperatorTok">}</text:span><text:span text:style-name="NormalTok">);</text:span>
</text:p>
      <text:p text:style-name="Preformatted_20_Text">
</text:p>
      <text:p text:style-name="Preformatted_20_Text">
<text:span text:style-name="NormalTok"><text:s text:c="2"/></text:span><text:span text:style-name="KeywordTok">@override</text:span>
</text:p>
      <text:p text:style-name="Preformatted_20_Text">
<text:span text:style-name="NormalTok"><text:s text:c="2"/>Widget build(BuildContext context</text:span><text:span text:style-name="OperatorTok">,</text:span><text:span text:style-name="NormalTok"><text:s text:c="1"/>WidgetRef ref) </text:span><text:span text:style-name="OperatorTok">{</text:span>
</text:p>
      <text:p text:style-name="Preformatted_20_Text">
<text:span text:style-name="NormalTok"><text:s text:c="4"/></text:span><text:span text:style-name="AttributeTok">final</text:span><text:span text:style-name="NormalTok"><text:s text:c="1"/>homeState </text:span><text:span text:style-name="OperatorTok">=</text:span><text:span text:style-name="NormalTok"><text:s text:c="1"/>ref</text:span><text:span text:style-name="OperatorTok">.</text:span><text:span text:style-name="NormalTok">watch(homeViewModelProvider);</text:span>
</text:p>
      <text:p text:style-name="Preformatted_20_Text">
</text:p>
      <text:p text:style-name="Preformatted_20_Text">
<text:span text:style-name="NormalTok"><text:s text:c="4"/></text:span><text:span text:style-name="KeywordTok">return</text:span><text:span text:style-name="NormalTok"><text:s text:c="1"/>Scaffold(</text:span>
</text:p>
      <text:p text:style-name="Preformatted_20_Text">
<text:span text:style-name="NormalTok"><text:s text:c="6"/>backgroundColor</text:span><text:span text:style-name="OperatorTok">:</text:span><text:span text:style-name="NormalTok"><text:s text:c="1"/>Pallete</text:span><text:span text:style-name="OperatorTok">.</text:span><text:span text:style-name="NormalTok">scaffoldBackground</text:span><text:span text:style-name="OperatorTok">,</text:span>
</text:p>
      <text:p text:style-name="Preformatted_20_Text">
<text:span text:style-name="NormalTok"><text:s text:c="6"/>body</text:span><text:span text:style-name="OperatorTok">:</text:span><text:span text:style-name="NormalTok"><text:s text:c="1"/>SafeArea(</text:span>
</text:p>
      <text:p text:style-name="Preformatted_20_Text">
<text:span text:style-name="NormalTok"><text:s text:c="8"/>child</text:span><text:span text:style-name="OperatorTok">:</text:span><text:span text:style-name="NormalTok"><text:s text:c="1"/>homeState</text:span><text:span text:style-name="OperatorTok">.</text:span><text:span text:style-name="NormalTok">isLoading</text:span>
</text:p>
      <text:p text:style-name="Preformatted_20_Text">
<text:span text:style-name="NormalTok"><text:s text:c="12"/></text:span><text:span text:style-name="OperatorTok">?</text:span><text:span text:style-name="NormalTok"><text:s text:c="1"/>_buildLoading()</text:span>
</text:p>
      <text:p text:style-name="Preformatted_20_Text">
<text:span text:style-name="NormalTok"><text:s text:c="12"/></text:span><text:span text:style-name="OperatorTok">:</text:span><text:span text:style-name="NormalTok"><text:s text:c="1"/>homeState</text:span><text:span text:style-name="OperatorTok">.</text:span><text:span text:style-name="NormalTok">error </text:span><text:span text:style-name="OperatorTok">!=</text:span><text:span text:style-name="NormalTok"><text:s text:c="1"/></text:span><text:span text:style-name="ConstantTok">null</text:span>
</text:p>
      <text:p text:style-name="Preformatted_20_Text">
<text:span text:style-name="NormalTok"><text:s text:c="12"/></text:span><text:span text:style-name="OperatorTok">?</text:span><text:span text:style-name="NormalTok"><text:s text:c="1"/>_buildError(homeState</text:span><text:span text:style-name="OperatorTok">.</text:span><text:span text:style-name="NormalTok">error</text:span><text:span text:style-name="OperatorTok">!,</text:span><text:span text:style-name="NormalTok"><text:s text:c="1"/>ref)</text:span>
</text:p>
      <text:p text:style-name="Preformatted_20_Text">
<text:span text:style-name="NormalTok"><text:s text:c="12"/></text:span><text:span text:style-name="OperatorTok">:</text:span><text:span text:style-name="NormalTok"><text:s text:c="1"/>_buildContent(context</text:span><text:span text:style-name="OperatorTok">,</text:span><text:span text:style-name="NormalTok"><text:s text:c="1"/>ref</text:span><text:span text:style-name="OperatorTok">,</text:span><text:span text:style-name="NormalTok"><text:s text:c="1"/>homeState)</text:span><text:span text:style-name="OperatorTok">,</text:span>
</text:p>
      <text:p text:style-name="Preformatted_20_Text">
<text:span text:style-name="NormalTok"><text:s text:c="6"/>)</text:span><text:span text:style-name="OperatorTok">,</text:span>
</text:p>
      <text:p text:style-name="Preformatted_20_Text">
<text:span text:style-name="NormalTok"><text:s text:c="4"/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First_20_paragraph">File: <text:span text:style-name="Source_Text">client/lib/features/home/viewmodels/home_viewmodel.dart</text:span></text:p>
      <text:p text:style-name="Preformatted_20_Text">
<text:span text:style-name="NormalTok">@riverpod</text:span>
</text:p>
      <text:p text:style-name="Preformatted_20_Text">
<text:span text:style-name="KeywordTok">class</text:span><text:span text:style-name="NormalTok"><text:s text:c="1"/>HomeViewModel </text:span><text:span text:style-name="KeywordTok">extends</text:span><text:span text:style-name="NormalTok"><text:s text:c="1"/>_$HomeViewModel </text:span><text:span text:style-name="OperatorTok">{</text:span>
</text:p>
      <text:p text:style-name="Preformatted_20_Text">
<text:span text:style-name="NormalTok"><text:s text:c="2"/></text:span><text:span text:style-name="KeywordTok">@override</text:span>
</text:p>
      <text:p text:style-name="Preformatted_20_Text">
<text:span text:style-name="NormalTok"><text:s text:c="2"/>HomeState build() </text:span><text:span text:style-name="OperatorTok">{</text:span>
</text:p>
      <text:p text:style-name="Preformatted_20_Text">
<text:span text:style-name="NormalTok"><text:s text:c="4"/></text:span><text:span text:style-name="DataTypeTok">Future</text:span><text:span text:style-name="OperatorTok">.</text:span><text:span text:style-name="NormalTok">microtask(() </text:span><text:span text:style-name="OperatorTok">=&gt;</text:span><text:span text:style-name="NormalTok"><text:s text:c="1"/>_loadInitialData());</text:span>
</text:p>
      <text:p text:style-name="Preformatted_20_Text">
<text:span text:style-name="NormalTok"><text:s text:c="4"/></text:span><text:span text:style-name="KeywordTok">return</text:span><text:span text:style-name="NormalTok"><text:s text:c="1"/></text:span><text:span text:style-name="AttributeTok">const</text:span><text:span text:style-name="NormalTok"><text:s text:c="1"/>HomeState(isLoading</text:span><text:span text:style-name="OperatorTok">:</text:span><text:span text:style-name="NormalTok"><text:s text:c="1"/></text:span><text:span text:style-name="ConstantTok">true</text:span><text:span text:style-name="NormalTok">);</text:span>
</text:p>
      <text:p text:style-name="Preformatted_20_Text">
<text:span text:style-name="NormalTok"><text:s text:c="2"/></text:span><text:span text:style-name="OperatorTok">}</text:span>
</text:p>
      <text:p text:style-name="Preformatted_20_Text">
</text:p>
      <text:p text:style-name="Preformatted_20_Text">
<text:span text:style-name="NormalTok"><text:s text:c="2"/></text:span><text:span text:style-name="DataTypeTok">Future</text:span><text:span text:style-name="OperatorTok">&lt;</text:span><text:span text:style-name="DataTypeTok">void</text:span><text:span text:style-name="OperatorTok">&gt;</text:span><text:span text:style-name="NormalTok"><text:s text:c="1"/>_loadInitialData(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(</text:span><text:span text:style-name="OperatorTok">!</text:span><text:span text:style-name="NormalTok">ref</text:span><text:span text:style-name="OperatorTok">.</text:span><text:span text:style-name="NormalTok">mounted) </text:span><text:span text:style-name="KeywordTok">return</text:span><text:span text:style-name="NormalTok">;</text:span>
</text:p>
      <text:p text:style-name="Preformatted_20_Text">
<text:span text:style-name="NormalTok"><text:s text:c="4"/></text:span><text:span text:style-name="AttributeTok">await</text:span><text:span text:style-name="NormalTok"><text:s text:c="1"/></text:span><text:span text:style-name="DataTypeTok">Future</text:span><text:span text:style-name="OperatorTok">.</text:span><text:span text:style-name="NormalTok">wait([_loadBooks()</text:span><text:span text:style-name="OperatorTok">,</text:span><text:span text:style-name="NormalTok"><text:s text:c="1"/>_loadCategories()]);</text:span>
</text:p>
      <text:p text:style-name="Preformatted_20_Text">
<text:span text:style-name="NormalTok"><text:s text:c="2"/></text:span><text:span text:style-name="OperatorTok">}</text:span>
</text:p>
      <text:p text:style-name="Preformatted_20_Text">
</text:p>
      <text:p text:style-name="Preformatted_20_Text">
<text:span text:style-name="NormalTok"><text:s text:c="2"/></text:span><text:span text:style-name="DataTypeTok">Future</text:span><text:span text:style-name="OperatorTok">&lt;</text:span><text:span text:style-name="DataTypeTok">void</text:span><text:span text:style-name="OperatorTok">&gt;</text:span><text:span text:style-name="NormalTok"><text:s text:c="1"/>_loadBooks(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(</text:span><text:span text:style-name="OperatorTok">!</text:span><text:span text:style-name="NormalTok">ref</text:span><text:span text:style-name="OperatorTok">.</text:span><text:span text:style-name="NormalTok">mounted) </text:span><text:span text:style-name="KeywordTok">return</text:span><text:span text:style-name="NormalTok">;</text:span>
</text:p>
      <text:p text:style-name="Preformatted_20_Text">
<text:span text:style-name="NormalTok"><text:s text:c="4"/></text:span><text:span text:style-name="ControlFlowTok">try</text:span><text:span text:style-name="NormalTok"><text:s text:c="1"/></text:span><text:span text:style-name="OperatorTok">{</text:span>
</text:p>
      <text:p text:style-name="Preformatted_20_Text">
<text:span text:style-name="NormalTok"><text:s text:c="6"/></text:span><text:span text:style-name="AttributeTok">final</text:span><text:span text:style-name="NormalTok"><text:s text:c="1"/>repository </text:span><text:span text:style-name="OperatorTok">=</text:span><text:span text:style-name="NormalTok"><text:s text:c="1"/>ref</text:span><text:span text:style-name="OperatorTok">.</text:span><text:span text:style-name="NormalTok">read(bookRepositoryProvider);</text:span>
</text:p>
      <text:p text:style-name="Preformatted_20_Text">
<text:span text:style-name="NormalTok"><text:s text:c="6"/></text:span><text:span text:style-name="AttributeTok">final</text:span><text:span text:style-name="NormalTok"><text:s text:c="1"/>result </text:span><text:span text:style-name="OperatorTok">=</text:span><text:span text:style-name="NormalTok"><text:s text:c="1"/></text:span><text:span text:style-name="AttributeTok">await</text:span><text:span text:style-name="NormalTok"><text:s text:c="1"/>repository</text:span><text:span text:style-name="OperatorTok">.</text:span><text:span text:style-name="NormalTok">getAllBooks();</text:span>
</text:p>
      <text:p text:style-name="Preformatted_20_Text">
<text:span text:style-name="NormalTok"><text:s text:c="6"/></text:span><text:span text:style-name="ControlFlowTok">if</text:span><text:span text:style-name="NormalTok"><text:s text:c="1"/>(</text:span><text:span text:style-name="OperatorTok">!</text:span><text:span text:style-name="NormalTok">ref</text:span><text:span text:style-name="OperatorTok">.</text:span><text:span text:style-name="NormalTok">mounted) </text:span><text:span text:style-name="KeywordTok">return</text:span><text:span text:style-name="NormalTok">;</text:span>
</text:p>
      <text:p text:style-name="Preformatted_20_Text">
<text:span text:style-name="NormalTok"><text:s text:c="6"/>result</text:span><text:span text:style-name="OperatorTok">.</text:span><text:span text:style-name="NormalTok">fold(</text:span>
</text:p>
      <text:p text:style-name="Preformatted_20_Text">
<text:span text:style-name="NormalTok"><text:s text:c="8"/>(failure) </text:span><text:span text:style-name="OperatorTok">=&gt;</text:span>
</text:p>
      <text:p text:style-name="Preformatted_20_Text">
<text:span text:style-name="NormalTok"><text:s text:c="12"/>state </text:span><text:span text:style-name="OperatorTok">=</text:span><text:span text:style-name="NormalTok"><text:s text:c="1"/>state</text:span><text:span text:style-name="OperatorTok">.</text:span><text:span text:style-name="NormalTok">copyWith(isLoading</text:span><text:span text:style-name="OperatorTok">:</text:span><text:span text:style-name="NormalTok"><text:s text:c="1"/></text:span><text:span text:style-name="ConstantTok">false</text:span><text:span text:style-name="OperatorTok">,</text:span><text:span text:style-name="NormalTok"><text:s text:c="1"/>error</text:span><text:span text:style-name="OperatorTok">:</text:span><text:span text:style-name="NormalTok"><text:s text:c="1"/>failure</text:span><text:span text:style-name="OperatorTok">.</text:span><text:span text:style-name="NormalTok">message)</text:span><text:span text:style-name="OperatorTok">,</text:span>
</text:p>
      <text:p text:style-name="Preformatted_20_Text">
<text:span text:style-name="NormalTok"><text:s text:c="8"/>(books) </text:span><text:span text:style-name="OperatorTok">=&gt;</text:span><text:span text:style-name="NormalTok"><text:s text:c="1"/>state </text:span><text:span text:style-name="OperatorTok">=</text:span><text:span text:style-name="NormalTok"><text:s text:c="1"/>state</text:span><text:span text:style-name="OperatorTok">.</text:span><text:span text:style-name="NormalTok">copyWith(</text:span>
</text:p>
      <text:p text:style-name="Preformatted_20_Text">
<text:span text:style-name="NormalTok"><text:s text:c="10"/>books</text:span><text:span text:style-name="OperatorTok">:</text:span><text:span text:style-name="NormalTok"><text:s text:c="1"/>books</text:span><text:span text:style-name="OperatorTok">,</text:span>
</text:p>
      <text:p text:style-name="Preformatted_20_Text">
<text:span text:style-name="NormalTok"><text:s text:c="10"/>isLoading</text:span><text:span text:style-name="OperatorTok">:</text:span><text:span text:style-name="NormalTok"><text:s text:c="1"/>state</text:span><text:span text:style-name="OperatorTok">.</text:span><text:span text:style-name="NormalTok">categories</text:span><text:span text:style-name="OperatorTok">.</text:span><text:span text:style-name="NormalTok">isEmpty</text:span><text:span text:style-name="OperatorTok">,</text:span>
</text:p>
      <text:p text:style-name="Preformatted_20_Text">
<text:span text:style-name="NormalTok"><text:s text:c="8"/>)</text:span><text:span text:style-name="OperatorTok">,</text:span>
</text:p>
      <text:p text:style-name="Preformatted_20_Text">
<text:span text:style-name="NormalTok"><text:s text:c="6"/>);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catch</text:span><text:span text:style-name="NormalTok"><text:s text:c="1"/>(e) </text:span><text:span text:style-name="OperatorTok">{</text:span>
</text:p>
      <text:p text:style-name="Preformatted_20_Text">
<text:span text:style-name="NormalTok"><text:s text:c="6"/></text:span><text:span text:style-name="ControlFlowTok">if</text:span><text:span text:style-name="NormalTok"><text:s text:c="1"/>(</text:span><text:span text:style-name="OperatorTok">!</text:span><text:span text:style-name="NormalTok">ref</text:span><text:span text:style-name="OperatorTok">.</text:span><text:span text:style-name="NormalTok">mounted) </text:span><text:span text:style-name="KeywordTok">return</text:span><text:span text:style-name="NormalTok">;</text:span>
</text:p>
      <text:p text:style-name="Preformatted_20_Text">
<text:span text:style-name="NormalTok"><text:s text:c="6"/>state </text:span><text:span text:style-name="OperatorTok">=</text:span><text:span text:style-name="NormalTok"><text:s text:c="1"/>state</text:span><text:span text:style-name="OperatorTok">.</text:span><text:span text:style-name="NormalTok">copyWith(isLoading</text:span><text:span text:style-name="OperatorTok">:</text:span><text:span text:style-name="NormalTok"><text:s text:c="1"/></text:span><text:span text:style-name="ConstantTok">false</text:span><text:span text:style-name="OperatorTok">,</text:span><text:span text:style-name="NormalTok"><text:s text:c="1"/>error</text:span><text:span text:style-name="OperatorTok">:</text:span><text:span text:style-name="NormalTok"><text:s text:c="1"/>e</text:span><text:span text:style-name="OperatorTok">.</text:span><text:span text:style-name="NormalTok">toString()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clear-conclusion"/>Clear conclusion<text:bookmark-end text:name="clear-conclusion"/></text:h>
      <text:p text:style-name="First_20_paragraph">This is a real MVVM-style implementation, not just folder naming. The View depends on the ViewModel state, and the ViewModel coordinates repository calls and state updates.</text:p>
      <text:h text:style-name="Heading_20_2" text:outline-level="2"><text:bookmark-start text:name="repository-pattern"/>3.2 Repository Pattern<text:bookmark-end text:name="repository-pattern"/></text:h>
      <text:h text:style-name="Heading_20_3" text:outline-level="3"><text:bookmark-start text:name="what-it-is-1"/>What it is<text:bookmark-end text:name="what-it-is-1"/></text:h>
      <text:p text:style-name="First_20_paragraph">The Repository pattern hides data access details behind a clean API so the UI or ViewModel does not directly call HTTP or SQL.</text:p>
      <text:h text:style-name="Heading_20_3" text:outline-level="3"><text:bookmark-start text:name="why-your-code-matches-this-1"/>Why your code matches this<text:bookmark-end text:name="why-your-code-matches-this-1"/></text:h>
      <text:p text:style-name="First_20_paragraph">Your ViewModels call repository providers such as:</text:p>
      <text:list text:style-name="L5">
        <text:list-item>
          <text:p text:style-name="P13"><text:span text:style-name="Source_Text">bookRepositoryProvider</text:span></text:p>
        </text:list-item>
        <text:list-item>
          <text:p text:style-name="P13"><text:span text:style-name="Source_Text">loanRepositoryProvider</text:span></text:p>
        </text:list-item>
        <text:list-item>
          <text:p text:style-name="P13"><text:span text:style-name="Source_Text">favoritesRepositoryProvider</text:span></text:p>
        </text:list-item>
        <text:list-item>
          <text:p text:style-name="P13"><text:span text:style-name="Source_Text">userRepositoryProvider</text:span></text:p>
        </text:list-item>
      </text:list>
      <text:p text:style-name="First_20_paragraph">These repositories encapsulate backend calls and data conversion.</text:p>
      <text:h text:style-name="Heading_20_3" text:outline-level="3"><text:bookmark-start text:name="code-evidence-1"/>Code evidence<text:bookmark-end text:name="code-evidence-1"/></text:h>
      <text:p text:style-name="First_20_paragraph">File: <text:span text:style-name="Source_Text">client/lib/data/repository/book_repository.dart</text:span></text:p>
      <text:p text:style-name="Preformatted_20_Text">
<text:span text:style-name="NormalTok">@riverpod</text:span>
</text:p>
      <text:p text:style-name="Preformatted_20_Text">
<text:span text:style-name="NormalTok">BookRepository bookRepository(Ref ref) </text:span><text:span text:style-name="OperatorTok">{</text:span>
</text:p>
      <text:p text:style-name="Preformatted_20_Text">
<text:span text:style-name="NormalTok"><text:s text:c="2"/></text:span><text:span text:style-name="KeywordTok">return</text:span><text:span text:style-name="NormalTok"><text:s text:c="1"/>BookRepository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KeywordTok">class</text:span><text:span text:style-name="NormalTok"><text:s text:c="1"/>BookRepository </text:span><text:span text:style-name="OperatorTok">{</text:span>
</text:p>
      <text:p text:style-name="Preformatted_20_Text">
<text:span text:style-name="NormalTok"><text:s text:c="2"/></text:span><text:span text:style-name="DataTypeTok">Future</text:span><text:span text:style-name="OperatorTok">&lt;</text:span><text:span text:style-name="NormalTok">Either</text:span><text:span text:style-name="OperatorTok">&lt;</text:span><text:span text:style-name="NormalTok">Failure</text:span><text:span text:style-name="OperatorTok">,</text:span><text:span text:style-name="NormalTok"><text:s text:c="1"/></text:span><text:span text:style-name="DataTypeTok">List</text:span><text:span text:style-name="OperatorTok">&lt;</text:span><text:span text:style-name="NormalTok">Book</text:span><text:span text:style-name="OperatorTok">&gt;&gt;&gt;</text:span><text:span text:style-name="NormalTok"><text:s text:c="1"/>getAllBooks(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try</text:span><text:span text:style-name="NormalTok"><text:s text:c="1"/></text:span><text:span text:style-name="OperatorTok">{</text:span>
</text:p>
      <text:p text:style-name="Preformatted_20_Text">
<text:span text:style-name="NormalTok"><text:s text:c="6"/></text:span><text:span text:style-name="AttributeTok">final</text:span><text:span text:style-name="NormalTok"><text:s text:c="1"/>res </text:span><text:span text:style-name="OperatorTok">=</text:span><text:span text:style-name="NormalTok"><text:s text:c="1"/></text:span><text:span text:style-name="AttributeTok">await</text:span><text:span text:style-name="NormalTok"><text:s text:c="1"/>AuthenticatedHttpClient</text:span><text:span text:style-name="OperatorTok">.</text:span><text:span text:style-name="KeywordTok">get</text:span><text:span text:style-name="NormalTok">(</text:span>
</text:p>
      <text:p text:style-name="Preformatted_20_Text">
<text:span text:style-name="NormalTok"><text:s text:c="8"/>Uri</text:span><text:span text:style-name="OperatorTok">.</text:span><text:span text:style-name="NormalTok">parse(</text:span><text:span text:style-name="StringTok">'${ServerConstant.serverURL}/books'</text:span><text:span text:style-name="NormalTok">)</text:span><text:span text:style-name="OperatorTok">,</text:span>
</text:p>
      <text:p text:style-name="Preformatted_20_Text">
<text:span text:style-name="NormalTok"><text:s text:c="6"/>);</text:span>
</text:p>
      <text:p text:style-name="Preformatted_20_Text">
</text:p>
      <text:p text:style-name="Preformatted_20_Text">
<text:span text:style-name="NormalTok"><text:s text:c="6"/></text:span><text:span text:style-name="ControlFlowTok">if</text:span><text:span text:style-name="NormalTok"><text:s text:c="1"/>(res</text:span><text:span text:style-name="OperatorTok">.</text:span><text:span text:style-name="NormalTok">statusCode </text:span><text:span text:style-name="OperatorTok">==</text:span><text:span text:style-name="NormalTok"><text:s text:c="1"/></text:span><text:span text:style-name="DecValTok">200</text:span><text:span text:style-name="NormalTok">) </text:span><text:span text:style-name="OperatorTok">{</text:span>
</text:p>
      <text:p text:style-name="Preformatted_20_Text">
<text:span text:style-name="NormalTok"><text:s text:c="8"/></text:span><text:span text:style-name="AttributeTok">final</text:span><text:span text:style-name="NormalTok"><text:s text:c="1"/></text:span><text:span text:style-name="DataTypeTok">List</text:span><text:span text:style-name="OperatorTok">&lt;</text:span><text:span text:style-name="AttributeTok">dynamic</text:span><text:span text:style-name="OperatorTok">&gt;</text:span><text:span text:style-name="NormalTok"><text:s text:c="1"/>data </text:span><text:span text:style-name="OperatorTok">=</text:span><text:span text:style-name="NormalTok"><text:s text:c="1"/>jsonDecode(res</text:span><text:span text:style-name="OperatorTok">.</text:span><text:span text:style-name="NormalTok">body);</text:span>
</text:p>
      <text:p text:style-name="Preformatted_20_Text">
<text:span text:style-name="NormalTok"><text:s text:c="8"/></text:span><text:span text:style-name="AttributeTok">final</text:span><text:span text:style-name="NormalTok"><text:s text:c="1"/>books </text:span><text:span text:style-name="OperatorTok">=</text:span><text:span text:style-name="NormalTok"><text:s text:c="1"/>data</text:span><text:span text:style-name="OperatorTok">.</text:span><text:span text:style-name="NormalTok">map((e) </text:span><text:span text:style-name="OperatorTok">{</text:span>
</text:p>
      <text:p text:style-name="Preformatted_20_Text">
<text:span text:style-name="NormalTok"><text:s text:c="10"/></text:span><text:span text:style-name="KeywordTok">return</text:span><text:span text:style-name="NormalTok"><text:s text:c="1"/>Book(</text:span>
</text:p>
      <text:p text:style-name="Preformatted_20_Text">
<text:span text:style-name="NormalTok"><text:s text:c="12"/>id</text:span><text:span text:style-name="OperatorTok">:</text:span><text:span text:style-name="NormalTok"><text:s text:c="1"/>e[</text:span><text:span text:style-name="StringTok">'id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12"/>title</text:span><text:span text:style-name="OperatorTok">:</text:span><text:span text:style-name="NormalTok"><text:s text:c="1"/>e[</text:span><text:span text:style-name="StringTok">'title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12"/>author</text:span><text:span text:style-name="OperatorTok">:</text:span><text:span text:style-name="NormalTok"><text:s text:c="1"/>e[</text:span><text:span text:style-name="StringTok">'author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Unknown Author'</text:span><text:span text:style-name="OperatorTok">,</text:span>
</text:p>
      <text:p text:style-name="Preformatted_20_Text">
<text:span text:style-name="NormalTok"><text:s text:c="12"/>category</text:span><text:span text:style-name="OperatorTok">:</text:span><text:span text:style-name="NormalTok"><text:s text:c="1"/>e[</text:span><text:span text:style-name="StringTok">'category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12"/>description</text:span><text:span text:style-name="OperatorTok">:</text:span>
</text:p>
      <text:p text:style-name="Preformatted_20_Text">
<text:span text:style-name="NormalTok"><text:s text:c="16"/>e[</text:span><text:span text:style-name="StringTok">'description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No description available.'</text:span><text:span text:style-name="OperatorTok">,</text:span>
</text:p>
      <text:p text:style-name="Preformatted_20_Text">
<text:span text:style-name="NormalTok"><text:s text:c="12"/>rating</text:span><text:span text:style-name="OperatorTok">:</text:span><text:span text:style-name="NormalTok"><text:s text:c="1"/>(e[</text:span><text:span text:style-name="StringTok">'rating'</text:span><text:span text:style-name="NormalTok">] </text:span><text:span text:style-name="KeywordTok">as</text:span><text:span text:style-name="NormalTok"><text:s text:c="1"/>num</text:span><text:span text:style-name="OperatorTok">?</text:span><text:span text:style-name="NormalTok">)</text:span><text:span text:style-name="OperatorTok">?.</text:span><text:span text:style-name="NormalTok">toDouble() </text:span><text:span text:style-name="OperatorTok">??</text:span><text:span text:style-name="NormalTok"><text:s text:c="1"/></text:span><text:span text:style-name="FloatTok">0.0</text:span><text:span text:style-name="OperatorTok">,</text:span>
</text:p>
      <text:p text:style-name="Preformatted_20_Text">
<text:span text:style-name="NormalTok"><text:s text:c="12"/>publicationYear</text:span><text:span text:style-name="OperatorTok">:</text:span><text:span text:style-name="NormalTok"><text:s text:c="1"/>e[</text:span><text:span text:style-name="StringTok">'publication_year'</text:span><text:span text:style-name="NormalTok">] </text:span><text:span text:style-name="KeywordTok">as</text:span><text:span text:style-name="NormalTok"><text:s text:c="1"/></text:span><text:span text:style-name="DataTypeTok">int</text:span><text:span text:style-name="OperatorTok">?</text:span><text:span text:style-name="NormalTok"><text:s text:c="1"/></text:span><text:span text:style-name="OperatorTok">??</text:span><text:span text:style-name="NormalTok"><text:s text:c="1"/></text:span><text:span text:style-name="DecValTok">0</text:span><text:span text:style-name="OperatorTok">,</text:span>
</text:p>
      <text:p text:style-name="Preformatted_20_Text">
<text:span text:style-name="NormalTok"><text:s text:c="12"/>copiesOwned</text:span><text:span text:style-name="OperatorTok">:</text:span><text:span text:style-name="NormalTok"><text:s text:c="1"/>e[</text:span><text:span text:style-name="StringTok">'copies_owned'</text:span><text:span text:style-name="NormalTok">] </text:span><text:span text:style-name="KeywordTok">as</text:span><text:span text:style-name="NormalTok"><text:s text:c="1"/></text:span><text:span text:style-name="DataTypeTok">int</text:span><text:span text:style-name="OperatorTok">?</text:span><text:span text:style-name="NormalTok"><text:s text:c="1"/></text:span><text:span text:style-name="OperatorTok">??</text:span><text:span text:style-name="NormalTok"><text:s text:c="1"/></text:span><text:span text:style-name="DecValTok">0</text:span><text:span text:style-name="OperatorTok">,</text:span>
</text:p>
      <text:p text:style-name="Preformatted_20_Text">
<text:span text:style-name="NormalTok"><text:s text:c="12"/>image</text:span><text:span text:style-name="OperatorTok">:</text:span><text:span text:style-name="NormalTok"><text:s text:c="1"/>e[</text:span><text:span text:style-name="StringTok">'image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https://via.placeholder.com/150'</text:span><text:span text:style-name="OperatorTok">,</text:span>
</text:p>
      <text:p text:style-name="Preformatted_20_Text">
<text:span text:style-name="NormalTok"><text:s text:c="12"/>language</text:span><text:span text:style-name="OperatorTok">:</text:span><text:span text:style-name="NormalTok"><text:s text:c="1"/>e[</text:span><text:span text:style-name="StringTok">'language'</text:span><text:span text:style-name="NormalTok">]</text:span><text:span text:style-name="OperatorTok">?.</text:span><text:span text:style-name="NormalTok">toString() </text:span><text:span text:style-name="OperatorTok">??</text:span><text:span text:style-name="NormalTok"><text:s text:c="1"/></text:span><text:span text:style-name="StringTok">'English'</text:span><text:span text:style-name="OperatorTok">,</text:span>
</text:p>
      <text:p text:style-name="Preformatted_20_Text">
<text:span text:style-name="NormalTok"><text:s text:c="12"/>pages</text:span><text:span text:style-name="OperatorTok">:</text:span><text:span text:style-name="NormalTok"><text:s text:c="1"/>e[</text:span><text:span text:style-name="StringTok">'pages'</text:span><text:span text:style-name="NormalTok">] </text:span><text:span text:style-name="KeywordTok">as</text:span><text:span text:style-name="NormalTok"><text:s text:c="1"/></text:span><text:span text:style-name="DataTypeTok">int</text:span><text:span text:style-name="OperatorTok">?</text:span><text:span text:style-name="NormalTok"><text:s text:c="1"/></text:span><text:span text:style-name="OperatorTok">??</text:span><text:span text:style-name="NormalTok"><text:s text:c="1"/></text:span><text:span text:style-name="DecValTok">200</text:span><text:span text:style-name="OperatorTok">,</text:span>
</text:p>
      <text:p text:style-name="Preformatted_20_Text">
<text:span text:style-name="NormalTok"><text:s text:c="12"/>ratingCount</text:span><text:span text:style-name="OperatorTok">:</text:span><text:span text:style-name="NormalTok"><text:s text:c="1"/>e[</text:span><text:span text:style-name="StringTok">'rating_count'</text:span><text:span text:style-name="NormalTok">] </text:span><text:span text:style-name="KeywordTok">as</text:span><text:span text:style-name="NormalTok"><text:s text:c="1"/></text:span><text:span text:style-name="DataTypeTok">int</text:span><text:span text:style-name="OperatorTok">?</text:span><text:span text:style-name="NormalTok"><text:s text:c="1"/></text:span><text:span text:style-name="OperatorTok">??</text:span><text:span text:style-name="NormalTok"><text:s text:c="1"/></text:span><text:span text:style-name="DecValTok">0</text:span><text:span text:style-name="OperatorTok">,</text:span>
</text:p>
      <text:p text:style-name="Preformatted_20_Text">
<text:span text:style-name="NormalTok"><text:s text:c="10"/>);</text:span>
</text:p>
      <text:p text:style-name="Preformatted_20_Text">
<text:span text:style-name="NormalTok"><text:s text:c="8"/></text:span><text:span text:style-name="OperatorTok">}</text:span><text:span text:style-name="NormalTok">)</text:span><text:span text:style-name="OperatorTok">.</text:span><text:span text:style-name="NormalTok">toList();</text:span>
</text:p>
      <text:p text:style-name="Preformatted_20_Text">
<text:span text:style-name="NormalTok"><text:s text:c="8"/></text:span><text:span text:style-name="KeywordTok">return</text:span><text:span text:style-name="NormalTok"><text:s text:c="1"/>right(books);</text:span>
</text:p>
      <text:p text:style-name="Preformatted_20_Text">
<text:span text:style-name="NormalTok"><text:s text:c="6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KeywordTok">return</text:span><text:span text:style-name="NormalTok"><text:s text:c="1"/>left(Failure(res</text:span><text:span text:style-name="OperatorTok">.</text:span><text:span text:style-name="NormalTok">body)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catch</text:span><text:span text:style-name="NormalTok"><text:s text:c="1"/>(e) </text:span><text:span text:style-name="OperatorTok">{</text:span>
</text:p>
      <text:p text:style-name="Preformatted_20_Text">
<text:span text:style-name="NormalTok"><text:s text:c="6"/></text:span><text:span text:style-name="KeywordTok">return</text:span><text:span text:style-name="NormalTok"><text:s text:c="1"/>left(Failure(e</text:span><text:span text:style-name="OperatorTok">.</text:span><text:span text:style-name="NormalTok">toString())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clear-conclusion-1"/>Clear conclusion<text:bookmark-end text:name="clear-conclusion-1"/></text:h>
      <text:p text:style-name="First_20_paragraph">Yes, your Flutter app is using the Repository pattern consistently.</text:p>
      <text:h text:style-name="Heading_20_2" text:outline-level="2"><text:bookmark-start text:name="observer-reactive-state-pattern"/>3.3 Observer / Reactive State Pattern<text:bookmark-end text:name="observer-reactive-state-pattern"/></text:h>
      <text:h text:style-name="Heading_20_3" text:outline-level="3"><text:bookmark-start text:name="what-it-is-2"/>What it is<text:bookmark-end text:name="what-it-is-2"/></text:h>
      <text:p text:style-name="First_20_paragraph">The Observer pattern means parts of the UI subscribe to state changes, and when the state changes, the UI updates automatically.</text:p>
      <text:h text:style-name="Heading_20_3" text:outline-level="3"><text:bookmark-start text:name="why-your-code-matches-this-2"/>Why your code matches this<text:bookmark-end text:name="why-your-code-matches-this-2"/></text:h>
      <text:p text:style-name="First_20_paragraph">Riverpod is a reactive state system. Your widgets use <text:span text:style-name="Source_Text">ref.watch(...)</text:span>, and some viewmodels use <text:span text:style-name="Source_Text">ref.listen(...)</text:span>. That is classic observer-style behavior.</text:p>
      <text:h text:style-name="Heading_20_3" text:outline-level="3"><text:bookmark-start text:name="code-evidence-2"/>Code evidence<text:bookmark-end text:name="code-evidence-2"/></text:h>
      <text:p text:style-name="First_20_paragraph">File: <text:span text:style-name="Source_Text">client/lib/features/profile/viewmodels/profile_viewmodel.dart</text:span></text:p>
      <text:p text:style-name="Preformatted_20_Text">
<text:span text:style-name="NormalTok">@riverpod</text:span>
</text:p>
      <text:p text:style-name="Preformatted_20_Text">
<text:span text:style-name="KeywordTok">class</text:span><text:span text:style-name="NormalTok"><text:s text:c="1"/>ProfileViewModel </text:span><text:span text:style-name="KeywordTok">extends</text:span><text:span text:style-name="NormalTok"><text:s text:c="1"/>_$ProfileViewModel </text:span><text:span text:style-name="OperatorTok">{</text:span>
</text:p>
      <text:p text:style-name="Preformatted_20_Text">
<text:span text:style-name="NormalTok"><text:s text:c="2"/></text:span><text:span text:style-name="KeywordTok">@override</text:span>
</text:p>
      <text:p text:style-name="Preformatted_20_Text">
<text:span text:style-name="NormalTok"><text:s text:c="2"/>ProfileState build() </text:span><text:span text:style-name="OperatorTok">{</text:span>
</text:p>
      <text:p text:style-name="Preformatted_20_Text">
<text:span text:style-name="NormalTok"><text:s text:c="4"/>ref</text:span><text:span text:style-name="OperatorTok">.</text:span><text:span text:style-name="NormalTok">listen(asgardeoDirectAuthProvider</text:span><text:span text:style-name="OperatorTok">,</text:span><text:span text:style-name="NormalTok"><text:s text:c="1"/>(previous</text:span><text:span text:style-name="OperatorTok">,</text:span><text:span text:style-name="NormalTok"><text:s text:c="1"/>next) </text:span><text:span text:style-name="OperatorTok">{</text:span>
</text:p>
      <text:p text:style-name="Preformatted_20_Text">
<text:span text:style-name="NormalTok"><text:s text:c="6"/></text:span><text:span text:style-name="AttributeTok">final</text:span><text:span text:style-name="NormalTok"><text:s text:c="1"/>prevUserId </text:span><text:span text:style-name="OperatorTok">=</text:span><text:span text:style-name="NormalTok"><text:s text:c="1"/>previous</text:span><text:span text:style-name="OperatorTok">?.</text:span><text:span text:style-name="NormalTok">user</text:span><text:span text:style-name="OperatorTok">?.</text:span><text:span text:style-name="NormalTok">sub;</text:span>
</text:p>
      <text:p text:style-name="Preformatted_20_Text">
<text:span text:style-name="NormalTok"><text:s text:c="6"/></text:span><text:span text:style-name="AttributeTok">final</text:span><text:span text:style-name="NormalTok"><text:s text:c="1"/>nextUserId </text:span><text:span text:style-name="OperatorTok">=</text:span><text:span text:style-name="NormalTok"><text:s text:c="1"/>next</text:span><text:span text:style-name="OperatorTok">.</text:span><text:span text:style-name="NormalTok">user</text:span><text:span text:style-name="OperatorTok">?.</text:span><text:span text:style-name="NormalTok">sub;</text:span>
</text:p>
      <text:p text:style-name="Preformatted_20_Text">
<text:span text:style-name="NormalTok"><text:s text:c="6"/></text:span><text:span text:style-name="ControlFlowTok">if</text:span><text:span text:style-name="NormalTok"><text:s text:c="1"/>(previous</text:span><text:span text:style-name="OperatorTok">?.</text:span><text:span text:style-name="NormalTok">isLoggedIn </text:span><text:span text:style-name="OperatorTok">!=</text:span><text:span text:style-name="NormalTok"><text:s text:c="1"/>next</text:span><text:span text:style-name="OperatorTok">.</text:span><text:span text:style-name="NormalTok">isLoggedIn </text:span><text:span text:style-name="OperatorTok">||</text:span><text:span text:style-name="NormalTok"><text:s text:c="1"/>prevUserId </text:span><text:span text:style-name="OperatorTok">!=</text:span><text:span text:style-name="NormalTok"><text:s text:c="1"/>nextUserId) </text:span><text:span text:style-name="OperatorTok">{</text:span>
</text:p>
      <text:p text:style-name="Preformatted_20_Text">
<text:span text:style-name="NormalTok"><text:s text:c="8"/></text:span><text:span text:style-name="DataTypeTok">Future</text:span><text:span text:style-name="OperatorTok">.</text:span><text:span text:style-name="NormalTok">microtask(loadProfileData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4"/></text:span><text:span text:style-name="OperatorTok">}</text:span><text:span text:style-name="NormalTok">);</text:span>
</text:p>
      <text:p text:style-name="Preformatted_20_Text">
</text:p>
      <text:p text:style-name="Preformatted_20_Text">
<text:span text:style-name="NormalTok"><text:s text:c="4"/>ref</text:span><text:span text:style-name="OperatorTok">.</text:span><text:span text:style-name="NormalTok">listen(currentUserProvider</text:span><text:span text:style-name="OperatorTok">,</text:span><text:span text:style-name="NormalTok"><text:s text:c="1"/>(previous</text:span><text:span text:style-name="OperatorTok">,</text:span><text:span text:style-name="NormalTok"><text:s text:c="1"/>next) </text:span><text:span text:style-name="OperatorTok">{</text:span>
</text:p>
      <text:p text:style-name="Preformatted_20_Text">
<text:span text:style-name="NormalTok"><text:s text:c="6"/></text:span><text:span text:style-name="ControlFlowTok">if</text:span><text:span text:style-name="NormalTok"><text:s text:c="1"/>(previous</text:span><text:span text:style-name="OperatorTok">?.</text:span><text:span text:style-name="NormalTok">id </text:span><text:span text:style-name="OperatorTok">!=</text:span><text:span text:style-name="NormalTok"><text:s text:c="1"/>next</text:span><text:span text:style-name="OperatorTok">?.</text:span><text:span text:style-name="NormalTok">id) </text:span><text:span text:style-name="OperatorTok">{</text:span>
</text:p>
      <text:p text:style-name="Preformatted_20_Text">
<text:span text:style-name="NormalTok"><text:s text:c="8"/></text:span><text:span text:style-name="DataTypeTok">Future</text:span><text:span text:style-name="OperatorTok">.</text:span><text:span text:style-name="NormalTok">microtask(loadProfileData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4"/></text:span><text:span text:style-name="OperatorTok">}</text:span><text:span text:style-name="NormalTok">);</text:span>
</text:p>
      <text:p text:style-name="Preformatted_20_Text">
</text:p>
      <text:p text:style-name="Preformatted_20_Text">
<text:span text:style-name="NormalTok"><text:s text:c="4"/></text:span><text:span text:style-name="DataTypeTok">Future</text:span><text:span text:style-name="OperatorTok">.</text:span><text:span text:style-name="NormalTok">microtask(() </text:span><text:span text:style-name="OperatorTok">=&gt;</text:span><text:span text:style-name="NormalTok"><text:s text:c="1"/>loadProfileData());</text:span>
</text:p>
      <text:p text:style-name="Preformatted_20_Text">
<text:span text:style-name="NormalTok"><text:s text:c="4"/></text:span><text:span text:style-name="KeywordTok">return</text:span><text:span text:style-name="NormalTok"><text:s text:c="1"/></text:span><text:span text:style-name="AttributeTok">const</text:span><text:span text:style-name="NormalTok"><text:s text:c="1"/>ProfileState(isLoading</text:span><text:span text:style-name="OperatorTok">:</text:span><text:span text:style-name="NormalTok"><text:s text:c="1"/></text:span><text:span text:style-name="ConstantTok">true</text:span><text:span text:style-name="Normal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First_20_paragraph">File: <text:span text:style-name="Source_Text">client/lib/features/home/views/home_view.dart</text:span></text:p>
      <text:p text:style-name="Preformatted_20_Text">
<text:span text:style-name="AttributeTok">final</text:span><text:span text:style-name="NormalTok"><text:s text:c="1"/>homeState </text:span><text:span text:style-name="OperatorTok">=</text:span><text:span text:style-name="NormalTok"><text:s text:c="1"/>ref</text:span><text:span text:style-name="OperatorTok">.</text:span><text:span text:style-name="NormalTok">watch(homeViewModelProvider);</text:span>
</text:p>
      <text:h text:style-name="Heading_20_3" text:outline-level="3"><text:bookmark-start text:name="clear-conclusion-2"/>Clear conclusion<text:bookmark-end text:name="clear-conclusion-2"/></text:h>
      <text:p text:style-name="First_20_paragraph">This is a strong example of the Observer pattern implemented through Riverpod.</text:p>
      <text:h text:style-name="Heading_20_2" text:outline-level="2"><text:bookmark-start text:name="single-source-of-truth-centralized-store-pattern"/>3.4 Single Source of Truth / Centralized Store Pattern<text:bookmark-end text:name="single-source-of-truth-centralized-store-pattern"/></text:h>
      <text:h text:style-name="Heading_20_3" text:outline-level="3"><text:bookmark-start text:name="what-it-is-3"/>What it is<text:bookmark-end text:name="what-it-is-3"/></text:h>
      <text:p text:style-name="First_20_paragraph">This pattern means one central state object owns a domain’s current data, instead of many screens keeping their own copies.</text:p>
      <text:h text:style-name="Heading_20_3" text:outline-level="3"><text:bookmark-start text:name="why-your-code-matches-this-3"/>Why your code matches this<text:bookmark-end text:name="why-your-code-matches-this-3"/></text:h>
      <text:p text:style-name="First_20_paragraph">Your global notifiers keep shared state for:</text:p>
      <text:list text:style-name="L6">
        <text:list-item>
          <text:p text:style-name="P14">favorites</text:p>
        </text:list-item>
        <text:list-item>
          <text:p text:style-name="P14">loans and reservations</text:p>
        </text:list-item>
        <text:list-item>
          <text:p text:style-name="P14">current user</text:p>
        </text:list-item>
        <text:list-item>
          <text:p text:style-name="P14">direct auth state</text:p>
        </text:list-item>
      </text:list>
      <text:p text:style-name="First_20_paragraph">Screens and viewmodels read from the same central store.</text:p>
      <text:h text:style-name="Heading_20_3" text:outline-level="3"><text:bookmark-start text:name="code-evidence-3"/>Code evidence<text:bookmark-end text:name="code-evidence-3"/></text:h>
      <text:p text:style-name="First_20_paragraph">File: <text:span text:style-name="Source_Text">client/lib/core/providers/favorites_notifier.dart</text:span></text:p>
      <text:p text:style-name="Preformatted_20_Text">
<text:span text:style-name="KeywordTok">class</text:span><text:span text:style-name="NormalTok"><text:s text:c="1"/>FavoritesState </text:span><text:span text:style-name="OperatorTok">{</text:span>
</text:p>
      <text:p text:style-name="Preformatted_20_Text">
<text:span text:style-name="NormalTok"><text:s text:c="2"/></text:span><text:span text:style-name="AttributeTok">final</text:span><text:span text:style-name="NormalTok"><text:s text:c="1"/></text:span><text:span text:style-name="DataTypeTok">List</text:span><text:span text:style-name="OperatorTok">&lt;</text:span><text:span text:style-name="NormalTok">Book</text:span><text:span text:style-name="OperatorTok">&gt;</text:span><text:span text:style-name="NormalTok"><text:s text:c="1"/>favorites;</text:span>
</text:p>
      <text:p text:style-name="Preformatted_20_Text">
<text:span text:style-name="NormalTok"><text:s text:c="2"/></text:span><text:span text:style-name="AttributeTok">final</text:span><text:span text:style-name="NormalTok"><text:s text:c="1"/></text:span><text:span text:style-name="DataTypeTok">Set</text:span><text:span text:style-name="OperatorTok">&lt;</text:span><text:span text:style-name="DataTypeTok">String</text:span><text:span text:style-name="OperatorTok">&gt;</text:span><text:span text:style-name="NormalTok"><text:s text:c="1"/>favoriteIds;</text:span>
</text:p>
      <text:p text:style-name="Preformatted_20_Text">
<text:span text:style-name="NormalTok"><text:s text:c="2"/></text:span><text:span text:style-name="AttributeTok">final</text:span><text:span text:style-name="NormalTok"><text:s text:c="1"/></text:span><text:span text:style-name="DataTypeTok">bool</text:span><text:span text:style-name="NormalTok"><text:s text:c="1"/>isLoading;</text:span>
</text:p>
      <text:p text:style-name="Preformatted_20_Text">
<text:span text:style-name="NormalTok"><text:s text:c="2"/></text:span><text:span text:style-name="AttributeTok">final</text:span><text:span text:style-name="NormalTok"><text:s text:c="1"/></text:span><text:span text:style-name="DataTypeTok">String</text:span><text:span text:style-name="OperatorTok">?</text:span><text:span text:style-name="NormalTok"><text:s text:c="1"/>error;</text:span>
</text:p>
      <text:p text:style-name="Preformatted_20_Text">
<text:span text:style-name="NormalTok"><text:s text:c="2"/></text:span><text:span text:style-name="AttributeTok">final</text:span><text:span text:style-name="NormalTok"><text:s text:c="1"/></text:span><text:span text:style-name="DataTypeTok">String</text:span><text:span text:style-name="NormalTok"><text:s text:c="1"/>memberId;</text:span>
</text:p>
      <text:p text:style-name="Preformatted_20_Text">
</text:p>
      <text:p text:style-name="Preformatted_20_Text">
<text:span text:style-name="NormalTok"><text:s text:c="2"/></text:span><text:span text:style-name="AttributeTok">const</text:span><text:span text:style-name="NormalTok"><text:s text:c="1"/>FavoritesState(</text:span><text:span text:style-name="OperatorTok">{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NormalTok">favorites </text:span><text:span text:style-name="OperatorTok">=</text:span><text:span text:style-name="NormalTok"><text:s text:c="1"/></text:span><text:span text:style-name="AttributeTok">const</text:span><text:span text:style-name="NormalTok"><text:s text:c="1"/>[]</text:span><text:span text:style-name="OperatorTok">,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NormalTok">favoriteIds </text:span><text:span text:style-name="OperatorTok">=</text:span><text:span text:style-name="NormalTok"><text:s text:c="1"/></text:span><text:span text:style-name="AttributeTok">const</text:span><text:span text:style-name="NormalTok"><text:s text:c="1"/></text:span><text:span text:style-name="OperatorTok">{},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NormalTok">isLoading </text:span><text:span text:style-name="OperatorTok">=</text:span><text:span text:style-name="NormalTok"><text:s text:c="1"/></text:span><text:span text:style-name="ConstantTok">false</text:span><text:span text:style-name="OperatorTok">,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NormalTok">error</text:span><text:span text:style-name="OperatorTok">,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NormalTok">memberId </text:span><text:span text:style-name="OperatorTok">=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2"/></text:span><text:span text:style-name="OperatorTok">}</text:span><text:span text:style-name="NormalTok">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NormalTok">@Riverpod(keepAlive</text:span><text:span text:style-name="OperatorTok">:</text:span><text:span text:style-name="NormalTok"><text:s text:c="1"/></text:span><text:span text:style-name="ConstantTok">true</text:span><text:span text:style-name="NormalTok">)</text:span>
</text:p>
      <text:p text:style-name="Preformatted_20_Text">
<text:span text:style-name="KeywordTok">class</text:span><text:span text:style-name="NormalTok"><text:s text:c="1"/>FavoritesNotifier </text:span><text:span text:style-name="KeywordTok">extends</text:span><text:span text:style-name="NormalTok"><text:s text:c="1"/>_$FavoritesNotifier </text:span><text:span text:style-name="OperatorTok">{</text:span>
</text:p>
      <text:p text:style-name="Preformatted_20_Text">
<text:span text:style-name="NormalTok"><text:s text:c="2"/></text:span><text:span text:style-name="KeywordTok">@override</text:span>
</text:p>
      <text:p text:style-name="Preformatted_20_Text">
<text:span text:style-name="NormalTok"><text:s text:c="2"/>FavoritesState build() </text:span><text:span text:style-name="OperatorTok">{</text:span>
</text:p>
      <text:p text:style-name="Preformatted_20_Text">
<text:span text:style-name="NormalTok"><text:s text:c="4"/></text:span><text:span text:style-name="DataTypeTok">Future</text:span><text:span text:style-name="OperatorTok">.</text:span><text:span text:style-name="NormalTok">microtask(() </text:span><text:span text:style-name="OperatorTok">=&gt;</text:span><text:span text:style-name="NormalTok"><text:s text:c="1"/>loadFavorites());</text:span>
</text:p>
      <text:p text:style-name="Preformatted_20_Text">
<text:span text:style-name="NormalTok"><text:s text:c="4"/></text:span><text:span text:style-name="KeywordTok">return</text:span><text:span text:style-name="NormalTok"><text:s text:c="1"/></text:span><text:span text:style-name="AttributeTok">const</text:span><text:span text:style-name="NormalTok"><text:s text:c="1"/>FavoritesState(isLoading</text:span><text:span text:style-name="OperatorTok">:</text:span><text:span text:style-name="NormalTok"><text:s text:c="1"/></text:span><text:span text:style-name="ConstantTok">true</text:span><text:span text:style-name="NormalTok">);</text:span>
</text:p>
      <text:p text:style-name="Preformatted_20_Text">
<text:span text:style-name="NormalTok"><text:s text:c="2"/></text:span><text:span text:style-name="OperatorTok">}</text:span>
</text:p>
      <text:p text:style-name="Preformatted_20_Text">
</text:p>
      <text:p text:style-name="Preformatted_20_Text">
<text:span text:style-name="NormalTok"><text:s text:c="2"/></text:span><text:span text:style-name="DataTypeTok">void</text:span><text:span text:style-name="NormalTok"><text:s text:c="1"/>setMemberId(</text:span><text:span text:style-name="DataTypeTok">String</text:span><text:span text:style-name="NormalTok"><text:s text:c="1"/>memberId) </text:span><text:span text:style-name="OperatorTok">{</text:span>
</text:p>
      <text:p text:style-name="Preformatted_20_Text">
<text:span text:style-name="NormalTok"><text:s text:c="4"/></text:span><text:span text:style-name="AttributeTok">final</text:span><text:span text:style-name="NormalTok"><text:s text:c="1"/>normalizedMemberId </text:span><text:span text:style-name="OperatorTok">=</text:span><text:span text:style-name="NormalTok"><text:s text:c="1"/>memberId</text:span><text:span text:style-name="OperatorTok">.</text:span><text:span text:style-name="NormalTok">trim();</text:span>
</text:p>
      <text:p text:style-name="Preformatted_20_Text">
<text:span text:style-name="NormalTok"><text:s text:c="4"/></text:span><text:span text:style-name="ControlFlowTok">if</text:span><text:span text:style-name="NormalTok"><text:s text:c="1"/>(state</text:span><text:span text:style-name="OperatorTok">.</text:span><text:span text:style-name="NormalTok">memberId </text:span><text:span text:style-name="OperatorTok">!=</text:span><text:span text:style-name="NormalTok"><text:s text:c="1"/>normalizedMemberId) </text:span><text:span text:style-name="OperatorTok">{</text:span>
</text:p>
      <text:p text:style-name="Preformatted_20_Text">
<text:span text:style-name="NormalTok"><text:s text:c="6"/>state </text:span><text:span text:style-name="OperatorTok">=</text:span><text:span text:style-name="NormalTok"><text:s text:c="1"/>state</text:span><text:span text:style-name="OperatorTok">.</text:span><text:span text:style-name="NormalTok">copyWith(memberId</text:span><text:span text:style-name="OperatorTok">:</text:span><text:span text:style-name="NormalTok"><text:s text:c="1"/>normalizedMemberId);</text:span>
</text:p>
      <text:p text:style-name="Preformatted_20_Text">
<text:span text:style-name="NormalTok"><text:s text:c="6"/>loadFavorites(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clear-conclusion-3"/>Clear conclusion<text:bookmark-end text:name="clear-conclusion-3"/></text:h>
      <text:p text:style-name="First_20_paragraph">This is more than just state management. It is a central store pattern where one provider is the source of truth for a domain.</text:p>
      <text:h text:style-name="Heading_20_2" text:outline-level="2"><text:bookmark-start text:name="facade-wrapper-pattern"/>3.5 Facade / Wrapper Pattern<text:bookmark-end text:name="facade-wrapper-pattern"/></text:h>
      <text:h text:style-name="Heading_20_3" text:outline-level="3"><text:bookmark-start text:name="what-it-is-4"/>What it is<text:bookmark-end text:name="what-it-is-4"/></text:h>
      <text:p text:style-name="First_20_paragraph">A Facade provides a simpler interface in front of a more complex subsystem.</text:p>
      <text:h text:style-name="Heading_20_3" text:outline-level="3"><text:bookmark-start text:name="why-your-code-matches-this-4"/>Why your code matches this<text:bookmark-end text:name="why-your-code-matches-this-4"/></text:h>
      <text:p text:style-name="First_20_paragraph"><text:span text:style-name="Source_Text">AuthenticatedHttpClient</text:span> hides token-reading and header-building details so repositories do not repeat that logic.</text:p>
      <text:h text:style-name="Heading_20_3" text:outline-level="3"><text:bookmark-start text:name="code-evidence-4"/>Code evidence<text:bookmark-end text:name="code-evidence-4"/></text:h>
      <text:p text:style-name="First_20_paragraph">File: <text:span text:style-name="Source_Text">client/lib/core/services/authenticated_http_client.dart</text:span></text:p>
      <text:p text:style-name="Preformatted_20_Text">
<text:span text:style-name="KeywordTok">class</text:span><text:span text:style-name="NormalTok"><text:s text:c="1"/>AuthenticatedHttpClient </text:span><text:span text:style-name="OperatorTok">{</text:span>
</text:p>
      <text:p text:style-name="Preformatted_20_Text">
<text:span text:style-name="NormalTok"><text:s text:c="2"/></text:span><text:span text:style-name="AttributeTok">static</text:span><text:span text:style-name="NormalTok"><text:s text:c="1"/></text:span><text:span text:style-name="AttributeTok">const</text:span><text:span text:style-name="NormalTok"><text:s text:c="1"/>FlutterSecureStorage _secureStorage </text:span><text:span text:style-name="OperatorTok">=</text:span><text:span text:style-name="NormalTok"><text:s text:c="1"/>FlutterSecureStorage();</text:span>
</text:p>
      <text:p text:style-name="Preformatted_20_Text">
<text:span text:style-name="NormalTok"><text:s text:c="2"/></text:span><text:span text:style-name="AttributeTok">static</text:span><text:span text:style-name="NormalTok"><text:s text:c="1"/></text:span><text:span text:style-name="AttributeTok">const</text:span><text:span text:style-name="NormalTok"><text:s text:c="1"/></text:span><text:span text:style-name="DataTypeTok">String</text:span><text:span text:style-name="NormalTok"><text:s text:c="1"/>_accessTokenKey </text:span><text:span text:style-name="OperatorTok">=</text:span><text:span text:style-name="NormalTok"><text:s text:c="1"/></text:span><text:span text:style-name="StringTok">'asgardeo_access_token'</text:span><text:span text:style-name="NormalTok">;</text:span>
</text:p>
      <text:p text:style-name="Preformatted_20_Text">
</text:p>
      <text:p text:style-name="Preformatted_20_Text">
<text:span text:style-name="NormalTok"><text:s text:c="2"/></text:span><text:span text:style-name="AttributeTok">static</text:span><text:span text:style-name="NormalTok"><text:s text:c="1"/></text:span><text:span text:style-name="DataTypeTok">Future</text:span><text:span text:style-name="OperatorTok">&lt;</text:span><text:span text:style-name="DataTypeTok">String</text:span><text:span text:style-name="OperatorTok">?&gt;</text:span><text:span text:style-name="NormalTok"><text:s text:c="1"/>_getToken(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KeywordTok">return</text:span><text:span text:style-name="NormalTok"><text:s text:c="1"/>_secureStorage</text:span><text:span text:style-name="OperatorTok">.</text:span><text:span text:style-name="NormalTok">read(key</text:span><text:span text:style-name="OperatorTok">:</text:span><text:span text:style-name="NormalTok"><text:s text:c="1"/>_accessTokenKey);</text:span>
</text:p>
      <text:p text:style-name="Preformatted_20_Text">
<text:span text:style-name="NormalTok"><text:s text:c="2"/></text:span><text:span text:style-name="OperatorTok">}</text:span>
</text:p>
      <text:p text:style-name="Preformatted_20_Text">
</text:p>
      <text:p text:style-name="Preformatted_20_Text">
<text:span text:style-name="NormalTok"><text:s text:c="2"/></text:span><text:span text:style-name="AttributeTok">static</text:span><text:span text:style-name="NormalTok"><text:s text:c="1"/></text:span><text:span text:style-name="DataTypeTok">Future</text:span><text:span text:style-name="OperatorTok">&lt;</text:span><text:span text:style-name="DataTypeTok">Map</text:span><text:span text:style-name="OperatorTok">&lt;</text:span><text:span text:style-name="DataTypeTok">String</text:span><text:span text:style-name="OperatorTok">,</text:span><text:span text:style-name="NormalTok"><text:s text:c="1"/></text:span><text:span text:style-name="DataTypeTok">String</text:span><text:span text:style-name="OperatorTok">&gt;&gt;</text:span><text:span text:style-name="NormalTok"><text:s text:c="1"/>_authHeaders([</text:span>
</text:p>
      <text:p text:style-name="Preformatted_20_Text">
<text:span text:style-name="NormalTok"><text:s text:c="4"/></text:span><text:span text:style-name="DataTypeTok">Map</text:span><text:span text:style-name="OperatorTok">&lt;</text:span><text:span text:style-name="DataTypeTok">String</text:span><text:span text:style-name="OperatorTok">,</text:span><text:span text:style-name="NormalTok"><text:s text:c="1"/></text:span><text:span text:style-name="DataTypeTok">String</text:span><text:span text:style-name="OperatorTok">&gt;?</text:span><text:span text:style-name="NormalTok"><text:s text:c="1"/>extra</text:span><text:span text:style-name="OperatorTok">,</text:span>
</text:p>
      <text:p text:style-name="Preformatted_20_Text">
<text:span text:style-name="NormalTok"><text:s text:c="2"/>]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AttributeTok">final</text:span><text:span text:style-name="NormalTok"><text:s text:c="1"/>token </text:span><text:span text:style-name="OperatorTok">=</text:span><text:span text:style-name="NormalTok"><text:s text:c="1"/></text:span><text:span text:style-name="AttributeTok">await</text:span><text:span text:style-name="NormalTok"><text:s text:c="1"/>_getToken();</text:span>
</text:p>
      <text:p text:style-name="Preformatted_20_Text">
<text:span text:style-name="NormalTok"><text:s text:c="4"/></text:span><text:span text:style-name="AttributeTok">final</text:span><text:span text:style-name="NormalTok"><text:s text:c="1"/>headers </text:span><text:span text:style-name="OperatorTok">=</text:span><text:span text:style-name="NormalTok"><text:s text:c="1"/></text:span><text:span text:style-name="OperatorTok">&lt;</text:span><text:span text:style-name="DataTypeTok">String</text:span><text:span text:style-name="OperatorTok">,</text:span><text:span text:style-name="NormalTok"><text:s text:c="1"/></text:span><text:span text:style-name="DataTypeTok">String</text:span><text:span text:style-name="OperatorTok">&gt;{}</text:span><text:span text:style-name="NormalTok">;</text:span>
</text:p>
      <text:p text:style-name="Preformatted_20_Text">
<text:span text:style-name="NormalTok"><text:s text:c="4"/></text:span><text:span text:style-name="ControlFlowTok">if</text:span><text:span text:style-name="NormalTok"><text:s text:c="1"/>(token </text:span><text:span text:style-name="OperatorTok">!=</text:span><text:span text:style-name="NormalTok"><text:s text:c="1"/></text:span><text:span text:style-name="ConstantTok">null</text:span><text:span text:style-name="NormalTok"><text:s text:c="1"/></text:span><text:span text:style-name="OperatorTok">&amp;&amp;</text:span><text:span text:style-name="NormalTok"><text:s text:c="1"/>token</text:span><text:span text:style-name="OperatorTok">.</text:span><text:span text:style-name="NormalTok">isNotEmpty) </text:span><text:span text:style-name="OperatorTok">{</text:span>
</text:p>
      <text:p text:style-name="Preformatted_20_Text">
<text:span text:style-name="NormalTok"><text:s text:c="6"/>headers[</text:span><text:span text:style-name="StringTok">'Authorization'</text:span><text:span text:style-name="NormalTok">] </text:span><text:span text:style-name="OperatorTok">=</text:span><text:span text:style-name="NormalTok"><text:s text:c="1"/></text:span><text:span text:style-name="StringTok">'Bearer $token'</text:span><text:span text:style-name="Normal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(extra </text:span><text:span text:style-name="OperatorTok">!=</text:span><text:span text:style-name="NormalTok"><text:s text:c="1"/></text:span><text:span text:style-name="ConstantTok">null</text:span><text:span text:style-name="NormalTok">) </text:span><text:span text:style-name="OperatorTok">{</text:span>
</text:p>
      <text:p text:style-name="Preformatted_20_Text">
<text:span text:style-name="NormalTok"><text:s text:c="6"/>headers</text:span><text:span text:style-name="OperatorTok">.</text:span><text:span text:style-name="NormalTok">addAll(extra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KeywordTok">return</text:span><text:span text:style-name="NormalTok"><text:s text:c="1"/>headers;</text:span>
</text:p>
      <text:p text:style-name="Preformatted_20_Text">
<text:span text:style-name="NormalTok"><text:s text:c="2"/></text:span><text:span text:style-name="OperatorTok">}</text:span>
</text:p>
      <text:p text:style-name="Preformatted_20_Text">
</text:p>
      <text:p text:style-name="Preformatted_20_Text">
<text:span text:style-name="NormalTok"><text:s text:c="2"/></text:span><text:span text:style-name="AttributeTok">static</text:span><text:span text:style-name="NormalTok"><text:s text:c="1"/></text:span><text:span text:style-name="DataTypeTok">Future</text:span><text:span text:style-name="OperatorTok">&lt;</text:span><text:span text:style-name="NormalTok">http</text:span><text:span text:style-name="OperatorTok">.</text:span><text:span text:style-name="NormalTok">Response</text:span><text:span text:style-name="OperatorTok">&gt;</text:span><text:span text:style-name="NormalTok"><text:s text:c="1"/></text:span><text:span text:style-name="KeywordTok">get</text:span><text:span text:style-name="NormalTok">(</text:span>
</text:p>
      <text:p text:style-name="Preformatted_20_Text">
<text:span text:style-name="NormalTok"><text:s text:c="4"/>Uri url</text:span><text:span text:style-name="OperatorTok">,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Map</text:span><text:span text:style-name="OperatorTok">&lt;</text:span><text:span text:style-name="DataTypeTok">String</text:span><text:span text:style-name="OperatorTok">,</text:span><text:span text:style-name="NormalTok"><text:s text:c="1"/></text:span><text:span text:style-name="DataTypeTok">String</text:span><text:span text:style-name="OperatorTok">&gt;?</text:span><text:span text:style-name="NormalTok"><text:s text:c="1"/>headers</text:span><text:span text:style-name="OperatorTok">,</text:span>
</text:p>
      <text:p text:style-name="Preformatted_20_Text">
<text:span text:style-name="NormalTok"><text:s text:c="2"/></text:span><text:span text:style-name="OperatorTok">}</text:span><text:span text:style-name="NormalTok">) </text:span><text:span text:style-name="AttributeTok">async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AttributeTok">final</text:span><text:span text:style-name="NormalTok"><text:s text:c="1"/>h </text:span><text:span text:style-name="OperatorTok">=</text:span><text:span text:style-name="NormalTok"><text:s text:c="1"/></text:span><text:span text:style-name="AttributeTok">await</text:span><text:span text:style-name="NormalTok"><text:s text:c="1"/>_authHeaders(headers);</text:span>
</text:p>
      <text:p text:style-name="Preformatted_20_Text">
<text:span text:style-name="NormalTok"><text:s text:c="4"/></text:span><text:span text:style-name="KeywordTok">return</text:span><text:span text:style-name="NormalTok"><text:s text:c="1"/>http</text:span><text:span text:style-name="OperatorTok">.</text:span><text:span text:style-name="KeywordTok">get</text:span><text:span text:style-name="NormalTok">(url</text:span><text:span text:style-name="OperatorTok">,</text:span><text:span text:style-name="NormalTok"><text:s text:c="1"/>headers</text:span><text:span text:style-name="OperatorTok">:</text:span><text:span text:style-name="NormalTok"><text:s text:c="1"/>h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clear-conclusion-4"/>Clear conclusion<text:bookmark-end text:name="clear-conclusion-4"/></text:h>
      <text:p text:style-name="First_20_paragraph">This is a small but valid Facade / wrapper pattern around authenticated HTTP behavior.</text:p>
      <text:h text:style-name="Heading_20_2" text:outline-level="2"><text:bookmark-start text:name="feature-based-modular-architecture"/>3.6 Feature-Based Modular Architecture<text:bookmark-end text:name="feature-based-modular-architecture"/></text:h>
      <text:h text:style-name="Heading_20_3" text:outline-level="3"><text:bookmark-start text:name="what-it-is-5"/>What it is<text:bookmark-end text:name="what-it-is-5"/></text:h>
      <text:p text:style-name="First_20_paragraph">Feature-based architecture organizes files by business feature instead of only by technical type.</text:p>
      <text:h text:style-name="Heading_20_3" text:outline-level="3"><text:bookmark-start text:name="why-your-code-matches-this-5"/>Why your code matches this<text:bookmark-end text:name="why-your-code-matches-this-5"/></text:h>
      <text:p text:style-name="First_20_paragraph">Your client is organized into:</text:p>
      <text:list text:style-name="L7">
        <text:list-item>
          <text:p text:style-name="P15"><text:span text:style-name="Source_Text">features/home</text:span></text:p>
        </text:list-item>
        <text:list-item>
          <text:p text:style-name="P15"><text:span text:style-name="Source_Text">features/search</text:span></text:p>
        </text:list-item>
        <text:list-item>
          <text:p text:style-name="P15"><text:span text:style-name="Source_Text">features/profile</text:span></text:p>
        </text:list-item>
        <text:list-item>
          <text:p text:style-name="P15"><text:span text:style-name="Source_Text">features/borrowed</text:span></text:p>
        </text:list-item>
        <text:list-item>
          <text:p text:style-name="P15"><text:span text:style-name="Source_Text">features/book_details</text:span></text:p>
        </text:list-item>
        <text:list-item>
          <text:p text:style-name="P15"><text:span text:style-name="Source_Text">features/wishlist</text:span></text:p>
        </text:list-item>
      </text:list>
      <text:p text:style-name="First_20_paragraph">Each feature contains its own views, widgets, and often its own viewmodel.</text:p>
      <text:h text:style-name="Heading_20_3" text:outline-level="3"><text:bookmark-start text:name="example-structure"/>Example structure<text:bookmark-end text:name="example-structure"/></text:h>
      <text:p text:style-name="P16">client/lib/features/</text:p>
      <text:p text:style-name="P17"><text:s text:c="2"/>home/</text:p>
      <text:p text:style-name="P18"><text:s text:c="4"/>views/</text:p>
      <text:p text:style-name="P19"><text:s text:c="4"/>viewmodels/</text:p>
      <text:p text:style-name="P20"><text:s text:c="4"/>widgets/</text:p>
      <text:p text:style-name="P21"><text:s text:c="2"/>search/</text:p>
      <text:p text:style-name="P22"><text:s text:c="4"/>views/</text:p>
      <text:p text:style-name="P23"><text:s text:c="4"/>viewmodels/</text:p>
      <text:p text:style-name="P24"><text:s text:c="4"/>widgets/</text:p>
      <text:p text:style-name="P25"><text:s text:c="2"/>profile/</text:p>
      <text:p text:style-name="P26"><text:s text:c="4"/>views/</text:p>
      <text:p text:style-name="P27"><text:s text:c="4"/>viewmodels/</text:p>
      <text:p text:style-name="P28"><text:s text:c="4"/>widgets/</text:p>
      <text:h text:style-name="Heading_20_3" text:outline-level="3"><text:bookmark-start text:name="clear-conclusion-5"/>Clear conclusion<text:bookmark-end text:name="clear-conclusion-5"/></text:h>
      <text:p text:style-name="First_20_paragraph">This is a modular feature-first architecture, which works well together with MVVM.</text:p>
      <text:h text:style-name="Heading_20_2" text:outline-level="2"><text:bookmark-start text:name="fastapi-server-patterns"/>4. FastAPI Server Patterns<text:bookmark-end text:name="fastapi-server-patterns"/></text:h>
      <text:h text:style-name="Heading_20_2" text:outline-level="2"><text:bookmark-start text:name="application-factory-pattern"/>4.1 Application Factory Pattern<text:bookmark-end text:name="application-factory-pattern"/></text:h>
      <text:h text:style-name="Heading_20_3" text:outline-level="3"><text:bookmark-start text:name="what-it-is-6"/>What it is<text:bookmark-end text:name="what-it-is-6"/></text:h>
      <text:p text:style-name="First_20_paragraph">The Application Factory pattern creates the app through a function instead of configuring everything inline in a single global file.</text:p>
      <text:h text:style-name="Heading_20_3" text:outline-level="3"><text:bookmark-start text:name="why-your-code-matches-this-6"/>Why your code matches this<text:bookmark-end text:name="why-your-code-matches-this-6"/></text:h>
      <text:p text:style-name="First_20_paragraph">Your backend app is created through <text:span text:style-name="Source_Text">create_app()</text:span> and returned after routers, middleware, rate limiting, CORS, static assets, and security headers are configured.</text:p>
      <text:h text:style-name="Heading_20_3" text:outline-level="3"><text:bookmark-start text:name="code-evidence-5"/>Code evidence<text:bookmark-end text:name="code-evidence-5"/></text:h>
      <text:p text:style-name="First_20_paragraph">File: <text:span text:style-name="Source_Text">server/app/main.py</text:span></text:p>
      <text:p text:style-name="Preformatted_20_Text">
<text:span text:style-name="ImportTok">from</text:span><text:span text:style-name="NormalTok"><text:s text:c="1"/>.app_factory </text:span><text:span text:style-name="ImportTok">import</text:span><text:span text:style-name="NormalTok"><text:s text:c="1"/>create_app</text:span>
</text:p>
      <text:p text:style-name="Preformatted_20_Text">
</text:p>
      <text:p text:style-name="Preformatted_20_Text">
<text:span text:style-name="NormalTok">app </text:span><text:span text:style-name="OperatorTok">=</text:span><text:span text:style-name="NormalTok"><text:s text:c="1"/>create_app()</text:span>
</text:p>
      <text:p text:style-name="First_20_paragraph">File: <text:span text:style-name="Source_Text">server/app/app_factory.py</text:span></text:p>
      <text:p text:style-name="Preformatted_20_Text">
<text:span text:style-name="KeywordTok">def</text:span><text:span text:style-name="NormalTok"><text:s text:c="1"/>create_app() </text:span><text:span text:style-name="OperatorTok">-&gt;</text:span><text:span text:style-name="NormalTok"><text:s text:c="1"/>FastAPI:</text:span>
</text:p>
      <text:p text:style-name="Preformatted_20_Text">
<text:span text:style-name="NormalTok"><text:s text:c="4"/>app </text:span><text:span text:style-name="OperatorTok">=</text:span><text:span text:style-name="NormalTok"><text:s text:c="1"/>FastAPI(title</text:span><text:span text:style-name="OperatorTok">=</text:span><text:span text:style-name="StringTok">"Library App API"</text:span><text:span text:style-name="NormalTok">, lifespan</text:span><text:span text:style-name="OperatorTok">=</text:span><text:span text:style-name="NormalTok">lifespan)</text:span>
</text:p>
      <text:p text:style-name="Preformatted_20_Text">
</text:p>
      <text:p text:style-name="Preformatted_20_Text">
<text:span text:style-name="NormalTok"><text:s text:c="4"/>default_limit </text:span><text:span text:style-name="OperatorTok">=</text:span><text:span text:style-name="NormalTok"><text:s text:c="1"/>os.getenv(</text:span><text:span text:style-name="StringTok">"DEFAULT_RATE_LIMIT"</text:span><text:span text:style-name="NormalTok">, </text:span><text:span text:style-name="StringTok">"60/minute"</text:span><text:span text:style-name="NormalTok">)</text:span>
</text:p>
      <text:p text:style-name="Preformatted_20_Text">
<text:span text:style-name="NormalTok"><text:s text:c="4"/>limiter </text:span><text:span text:style-name="OperatorTok">=</text:span><text:span text:style-name="NormalTok"><text:s text:c="1"/>create_limiter(default_limits</text:span><text:span text:style-name="OperatorTok">=</text:span><text:span text:style-name="NormalTok">[default_limit])</text:span>
</text:p>
      <text:p text:style-name="Preformatted_20_Text">
<text:span text:style-name="NormalTok"><text:s text:c="4"/>app.state.limiter </text:span><text:span text:style-name="OperatorTok">=</text:span><text:span text:style-name="NormalTok"><text:s text:c="1"/>limiter</text:span>
</text:p>
      <text:p text:style-name="Preformatted_20_Text">
</text:p>
      <text:p text:style-name="Preformatted_20_Text">
<text:span text:style-name="NormalTok"><text:s text:c="4"/>app.add_middleware(</text:span>
</text:p>
      <text:p text:style-name="Preformatted_20_Text">
<text:span text:style-name="NormalTok"><text:s text:c="8"/>CORSMiddleware,</text:span>
</text:p>
      <text:p text:style-name="Preformatted_20_Text">
<text:span text:style-name="NormalTok"><text:s text:c="8"/>allow_origins</text:span><text:span text:style-name="OperatorTok">=</text:span><text:span text:style-name="NormalTok">allowed_origins,</text:span>
</text:p>
      <text:p text:style-name="Preformatted_20_Text">
<text:span text:style-name="NormalTok"><text:s text:c="8"/>allow_credentials</text:span><text:span text:style-name="OperatorTok">=</text:span><text:span text:style-name="NormalTok">allow_credentials,</text:span>
</text:p>
      <text:p text:style-name="Preformatted_20_Text">
<text:span text:style-name="NormalTok"><text:s text:c="8"/>allow_methods</text:span><text:span text:style-name="OperatorTok">=</text:span><text:span text:style-name="NormalTok">[</text:span><text:span text:style-name="StringTok">"GET"</text:span><text:span text:style-name="NormalTok">, </text:span><text:span text:style-name="StringTok">"POST"</text:span><text:span text:style-name="NormalTok">, </text:span><text:span text:style-name="StringTok">"PUT"</text:span><text:span text:style-name="NormalTok">, </text:span><text:span text:style-name="StringTok">"DELETE"</text:span><text:span text:style-name="NormalTok">, </text:span><text:span text:style-name="StringTok">"PATCH"</text:span><text:span text:style-name="NormalTok">, </text:span><text:span text:style-name="StringTok">"OPTIONS"</text:span><text:span text:style-name="NormalTok">, </text:span><text:span text:style-name="StringTok">"HEAD"</text:span><text:span text:style-name="NormalTok">],</text:span>
</text:p>
      <text:p text:style-name="Preformatted_20_Text">
<text:span text:style-name="NormalTok"><text:s text:c="8"/>allow_headers</text:span><text:span text:style-name="OperatorTok">=</text:span><text:span text:style-name="NormalTok">[</text:span><text:span text:style-name="StringTok">"*"</text:span><text:span text:style-name="NormalTok">],</text:span>
</text:p>
      <text:p text:style-name="Preformatted_20_Text">
<text:span text:style-name="NormalTok"><text:s text:c="4"/>)</text:span>
</text:p>
      <text:p text:style-name="Preformatted_20_Text">
</text:p>
      <text:p text:style-name="Preformatted_20_Text">
<text:span text:style-name="NormalTok"><text:s text:c="4"/>app.include_router(general.router)</text:span>
</text:p>
      <text:p text:style-name="Preformatted_20_Text">
<text:span text:style-name="NormalTok"><text:s text:c="4"/>app.include_router(auth.router)</text:span>
</text:p>
      <text:p text:style-name="Preformatted_20_Text">
<text:span text:style-name="NormalTok"><text:s text:c="4"/>app.include_router(books.router)</text:span>
</text:p>
      <text:p text:style-name="Preformatted_20_Text">
<text:span text:style-name="NormalTok"><text:s text:c="4"/>app.include_router(loans.router)</text:span>
</text:p>
      <text:p text:style-name="Preformatted_20_Text">
<text:span text:style-name="NormalTok"><text:s text:c="4"/>app.include_router(category.router)</text:span>
</text:p>
      <text:p text:style-name="Preformatted_20_Text">
<text:span text:style-name="NormalTok"><text:s text:c="4"/>app.include_router(favorites.router)</text:span>
</text:p>
      <text:p text:style-name="Preformatted_20_Text">
<text:span text:style-name="NormalTok"><text:s text:c="4"/>app.include_router(users.router)</text:span>
</text:p>
      <text:p text:style-name="Preformatted_20_Text">
<text:span text:style-name="NormalTok"><text:s text:c="4"/>app.include_router(reservations.router)</text:span>
</text:p>
      <text:p text:style-name="Preformatted_20_Text">
<text:span text:style-name="NormalTok"><text:s text:c="4"/>app.include_router(settings.router)</text:span>
</text:p>
      <text:p text:style-name="Preformatted_20_Text">
</text:p>
      <text:p text:style-name="Preformatted_20_Text">
<text:span text:style-name="NormalTok"><text:s text:c="4"/></text:span><text:span text:style-name="ControlFlowTok">return</text:span><text:span text:style-name="NormalTok"><text:s text:c="1"/>app</text:span>
</text:p>
      <text:h text:style-name="Heading_20_3" text:outline-level="3"><text:bookmark-start text:name="clear-conclusion-6"/>Clear conclusion<text:bookmark-end text:name="clear-conclusion-6"/></text:h>
      <text:p text:style-name="First_20_paragraph">Yes, your backend clearly uses the Application Factory pattern.</text:p>
      <text:h text:style-name="Heading_20_2" text:outline-level="2"><text:bookmark-start text:name="dependency-injection-pattern"/>4.2 Dependency Injection Pattern<text:bookmark-end text:name="dependency-injection-pattern"/></text:h>
      <text:h text:style-name="Heading_20_3" text:outline-level="3"><text:bookmark-start text:name="what-it-is-7"/>What it is<text:bookmark-end text:name="what-it-is-7"/></text:h>
      <text:p text:style-name="First_20_paragraph">Dependency Injection provides external dependencies to functions and classes instead of hardcoding them directly.</text:p>
      <text:h text:style-name="Heading_20_3" text:outline-level="3"><text:bookmark-start text:name="why-your-code-matches-this-7"/>Why your code matches this<text:bookmark-end text:name="why-your-code-matches-this-7"/></text:h>
      <text:p text:style-name="First_20_paragraph">FastAPI injects:</text:p>
      <text:list text:style-name="L8">
        <text:list-item>
          <text:p text:style-name="P29">database sessions</text:p>
        </text:list-item>
        <text:list-item>
          <text:p text:style-name="P29">token verification dependencies</text:p>
        </text:list-item>
      </text:list>
      <text:p text:style-name="First_20_paragraph">using <text:span text:style-name="Source_Text">Depends(...)</text:span>.</text:p>
      <text:h text:style-name="Heading_20_3" text:outline-level="3"><text:bookmark-start text:name="code-evidence-6"/>Code evidence<text:bookmark-end text:name="code-evidence-6"/></text:h>
      <text:p text:style-name="First_20_paragraph">File: <text:span text:style-name="Source_Text">server/app/dependencies.py</text:span></text:p>
      <text:p text:style-name="Preformatted_20_Text">
<text:span text:style-name="KeywordTok">def</text:span><text:span text:style-name="NormalTok"><text:s text:c="1"/>get_db():</text:span>
</text:p>
      <text:p text:style-name="Preformatted_20_Text">
<text:span text:style-name="NormalTok"><text:s text:c="4"/>db </text:span><text:span text:style-name="OperatorTok">=</text:span><text:span text:style-name="NormalTok"><text:s text:c="1"/>SessionLocal()</text:span>
</text:p>
      <text:p text:style-name="Preformatted_20_Text">
<text:span text:style-name="NormalTok"><text:s text:c="4"/></text:span><text:span text:style-name="ControlFlowTok">try</text:span><text:span text:style-name="NormalTok">:</text:span>
</text:p>
      <text:p text:style-name="Preformatted_20_Text">
<text:span text:style-name="NormalTok"><text:s text:c="8"/></text:span><text:span text:style-name="ControlFlowTok">yield</text:span><text:span text:style-name="NormalTok"><text:s text:c="1"/>db</text:span>
</text:p>
      <text:p text:style-name="Preformatted_20_Text">
<text:span text:style-name="NormalTok"><text:s text:c="4"/></text:span><text:span text:style-name="ControlFlowTok">finally</text:span><text:span text:style-name="NormalTok">:</text:span>
</text:p>
      <text:p text:style-name="Preformatted_20_Text">
<text:span text:style-name="NormalTok"><text:s text:c="8"/>db.close()</text:span>
</text:p>
      <text:p text:style-name="First_20_paragraph">File: <text:span text:style-name="Source_Text">server/app/routers/books.py</text:span></text:p>
      <text:p text:style-name="Preformatted_20_Text">
<text:span text:style-name="NormalTok">router </text:span><text:span text:style-name="OperatorTok">=</text:span><text:span text:style-name="NormalTok"><text:s text:c="1"/>APIRouter(</text:span>
</text:p>
      <text:p text:style-name="Preformatted_20_Text">
<text:span text:style-name="NormalTok"><text:s text:c="4"/>prefix</text:span><text:span text:style-name="OperatorTok">=</text:span><text:span text:style-name="StringTok">"/books"</text:span><text:span text:style-name="NormalTok">, tags</text:span><text:span text:style-name="OperatorTok">=</text:span><text:span text:style-name="NormalTok">[</text:span><text:span text:style-name="StringTok">"books"</text:span><text:span text:style-name="NormalTok">], dependencies</text:span><text:span text:style-name="OperatorTok">=</text:span><text:span text:style-name="NormalTok">[Depends(verify_access_token)]</text:span>
</text:p>
      <text:p text:style-name="Preformatted_20_Text">
<text:span text:style-name="NormalTok">)</text:span>
</text:p>
      <text:p text:style-name="Preformatted_20_Text">
</text:p>
      <text:p text:style-name="Preformatted_20_Text">
<text:span text:style-name="AttributeTok">@router.get</text:span><text:span text:style-name="NormalTok">(</text:span><text:span text:style-name="StringTok">""</text:span><text:span text:style-name="NormalTok">, response_model</text:span><text:span text:style-name="OperatorTok">=</text:span><text:span text:style-name="NormalTok">List[book_schema.Book])</text:span>
</text:p>
      <text:p text:style-name="Preformatted_20_Text">
<text:span text:style-name="KeywordTok">def</text:span><text:span text:style-name="NormalTok"><text:s text:c="1"/>get_books(db: Session </text:span><text:span text:style-name="OperatorTok">=</text:span><text:span text:style-name="NormalTok"><text:s text:c="1"/>Depends(get_db)):</text:span>
</text:p>
      <text:p text:style-name="Preformatted_20_Text">
<text:span text:style-name="NormalTok"><text:s text:c="4"/>books </text:span><text:span text:style-name="OperatorTok">=</text:span><text:span text:style-name="NormalTok"><text:s text:c="1"/>db.query(book_model.Book).</text:span><text:span text:style-name="BuiltInTok">all</text:span><text:span text:style-name="NormalTok">()</text:span>
</text:p>
      <text:p text:style-name="Preformatted_20_Text">
<text:span text:style-name="NormalTok"><text:s text:c="4"/></text:span><text:span text:style-name="ControlFlowTok">return</text:span><text:span text:style-name="NormalTok"><text:s text:c="1"/>[_book_to_response(b) </text:span><text:span text:style-name="ControlFlowTok">for</text:span><text:span text:style-name="NormalTok"><text:s text:c="1"/>b </text:span><text:span text:style-name="KeywordTok">in</text:span><text:span text:style-name="NormalTok"><text:s text:c="1"/>books]</text:span>
</text:p>
      <text:h text:style-name="Heading_20_3" text:outline-level="3"><text:bookmark-start text:name="clear-conclusion-7"/>Clear conclusion<text:bookmark-end text:name="clear-conclusion-7"/></text:h>
      <text:p text:style-name="First_20_paragraph">This is a textbook use of Dependency Injection in FastAPI.</text:p>
      <text:h text:style-name="Heading_20_2" text:outline-level="2"><text:bookmark-start text:name="router-controller-pattern"/>4.3 Router / Controller Pattern<text:bookmark-end text:name="router-controller-pattern"/></text:h>
      <text:h text:style-name="Heading_20_3" text:outline-level="3"><text:bookmark-start text:name="what-it-is-8"/>What it is<text:bookmark-end text:name="what-it-is-8"/></text:h>
      <text:p text:style-name="First_20_paragraph">The Router / Controller pattern groups related endpoints by domain responsibility.</text:p>
      <text:h text:style-name="Heading_20_3" text:outline-level="3"><text:bookmark-start text:name="why-your-code-matches-this-8"/>Why your code matches this<text:bookmark-end text:name="why-your-code-matches-this-8"/></text:h>
      <text:p text:style-name="First_20_paragraph">Your backend has separate route modules for:</text:p>
      <text:list text:style-name="L9">
        <text:list-item>
          <text:p text:style-name="P30">auth</text:p>
        </text:list-item>
        <text:list-item>
          <text:p text:style-name="P30">books</text:p>
        </text:list-item>
        <text:list-item>
          <text:p text:style-name="P30">loans</text:p>
        </text:list-item>
        <text:list-item>
          <text:p text:style-name="P30">category</text:p>
        </text:list-item>
        <text:list-item>
          <text:p text:style-name="P30">favorites</text:p>
        </text:list-item>
        <text:list-item>
          <text:p text:style-name="P30">users</text:p>
        </text:list-item>
        <text:list-item>
          <text:p text:style-name="P30">reservations</text:p>
        </text:list-item>
        <text:list-item>
          <text:p text:style-name="P30">settings</text:p>
        </text:list-item>
      </text:list>
      <text:p text:style-name="First_20_paragraph">Each router owns one domain area.</text:p>
      <text:h text:style-name="Heading_20_3" text:outline-level="3"><text:bookmark-start text:name="code-evidence-7"/>Code evidence<text:bookmark-end text:name="code-evidence-7"/></text:h>
      <text:p text:style-name="First_20_paragraph">File: <text:span text:style-name="Source_Text">server/app/app_factory.py</text:span></text:p>
      <text:p text:style-name="Preformatted_20_Text">
<text:span text:style-name="NormalTok">app.include_router(general.router)</text:span>
</text:p>
      <text:p text:style-name="Preformatted_20_Text">
<text:span text:style-name="NormalTok">app.include_router(auth.router)</text:span>
</text:p>
      <text:p text:style-name="Preformatted_20_Text">
<text:span text:style-name="NormalTok">app.include_router(books.router)</text:span>
</text:p>
      <text:p text:style-name="Preformatted_20_Text">
<text:span text:style-name="NormalTok">app.include_router(loans.router)</text:span>
</text:p>
      <text:p text:style-name="Preformatted_20_Text">
<text:span text:style-name="NormalTok">app.include_router(category.router)</text:span>
</text:p>
      <text:p text:style-name="Preformatted_20_Text">
<text:span text:style-name="NormalTok">app.include_router(favorites.router)</text:span>
</text:p>
      <text:p text:style-name="Preformatted_20_Text">
<text:span text:style-name="NormalTok">app.include_router(users.router)</text:span>
</text:p>
      <text:p text:style-name="Preformatted_20_Text">
<text:span text:style-name="NormalTok">app.include_router(reservations.router)</text:span>
</text:p>
      <text:p text:style-name="Preformatted_20_Text">
<text:span text:style-name="NormalTok">app.include_router(settings.router)</text:span>
</text:p>
      <text:p text:style-name="First_20_paragraph">File: <text:span text:style-name="Source_Text">server/app/routers/books.py</text:span></text:p>
      <text:p text:style-name="Preformatted_20_Text">
<text:span text:style-name="NormalTok">router </text:span><text:span text:style-name="OperatorTok">=</text:span><text:span text:style-name="NormalTok"><text:s text:c="1"/>APIRouter(</text:span>
</text:p>
      <text:p text:style-name="Preformatted_20_Text">
<text:span text:style-name="NormalTok"><text:s text:c="4"/>prefix</text:span><text:span text:style-name="OperatorTok">=</text:span><text:span text:style-name="StringTok">"/books"</text:span><text:span text:style-name="NormalTok">, tags</text:span><text:span text:style-name="OperatorTok">=</text:span><text:span text:style-name="NormalTok">[</text:span><text:span text:style-name="StringTok">"books"</text:span><text:span text:style-name="NormalTok">], dependencies</text:span><text:span text:style-name="OperatorTok">=</text:span><text:span text:style-name="NormalTok">[Depends(verify_access_token)]</text:span>
</text:p>
      <text:p text:style-name="Preformatted_20_Text">
<text:span text:style-name="NormalTok">)</text:span>
</text:p>
      <text:h text:style-name="Heading_20_3" text:outline-level="3"><text:bookmark-start text:name="clear-conclusion-8"/>Clear conclusion<text:bookmark-end text:name="clear-conclusion-8"/></text:h>
      <text:p text:style-name="First_20_paragraph">Yes, your backend is clearly structured using router/controller modules.</text:p>
      <text:h text:style-name="Heading_20_2" text:outline-level="2"><text:bookmark-start text:name="orm-dto-data-mapper-style-separation"/>4.4 ORM + DTO / Data Mapper Style Separation<text:bookmark-end text:name="orm-dto-data-mapper-style-separation"/></text:h>
      <text:h text:style-name="Heading_20_3" text:outline-level="3"><text:bookmark-start text:name="what-it-is-9"/>What it is<text:bookmark-end text:name="what-it-is-9"/></text:h>
      <text:p text:style-name="First_20_paragraph">This pattern separates:</text:p>
      <text:list text:style-name="L10">
        <text:list-item>
          <text:p text:style-name="P31">database objects</text:p>
        </text:list-item>
        <text:list-item>
          <text:p text:style-name="P31">API transport schemas</text:p>
        </text:list-item>
        <text:list-item>
          <text:p text:style-name="P31">mapping logic</text:p>
        </text:list-item>
      </text:list>
      <text:h text:style-name="Heading_20_3" text:outline-level="3"><text:bookmark-start text:name="why-your-code-matches-this-9"/>Why your code matches this<text:bookmark-end text:name="why-your-code-matches-this-9"/></text:h>
      <text:p text:style-name="First_20_paragraph">You do not expose SQLAlchemy models directly. You define:</text:p>
      <text:list text:style-name="L11">
        <text:list-item>
          <text:p text:style-name="P32">SQLAlchemy models in <text:span text:style-name="Source_Text">models/</text:span></text:p>
        </text:list-item>
        <text:list-item>
          <text:p text:style-name="P32">Pydantic schemas in <text:span text:style-name="Source_Text">pydantic_schemas/</text:span></text:p>
        </text:list-item>
        <text:list-item>
          <text:p text:style-name="P32">explicit conversion logic in routers</text:p>
        </text:list-item>
      </text:list>
      <text:h text:style-name="Heading_20_3" text:outline-level="3"><text:bookmark-start text:name="code-evidence-8"/>Code evidence<text:bookmark-end text:name="code-evidence-8"/></text:h>
      <text:p text:style-name="First_20_paragraph">File: <text:span text:style-name="Source_Text">server/app/models/book.py</text:span></text:p>
      <text:p text:style-name="Preformatted_20_Text">
<text:span text:style-name="KeywordTok">class</text:span><text:span text:style-name="NormalTok"><text:s text:c="1"/>Book(Base):</text:span>
</text:p>
      <text:p text:style-name="Preformatted_20_Text">
<text:span text:style-name="NormalTok"><text:s text:c="4"/>__tablename__ </text:span><text:span text:style-name="OperatorTok">=</text:span><text:span text:style-name="NormalTok"><text:s text:c="1"/></text:span><text:span text:style-name="StringTok">"books"</text:span>
</text:p>
      <text:p text:style-name="Preformatted_20_Text">
</text:p>
      <text:p text:style-name="Preformatted_20_Text">
<text:span text:style-name="NormalTok"><text:s text:c="4"/></text:span><text:span text:style-name="BuiltInTok">id</text:span><text:span text:style-name="NormalTok"><text:s text:c="1"/></text:span><text:span text:style-name="OperatorTok">=</text:span><text:span text:style-name="NormalTok"><text:s text:c="1"/>Column(TEXT, primary_key</text:span><text:span text:style-name="OperatorTok">=</text:span><text:span text:style-name="VariableTok">True</text:span><text:span text:style-name="NormalTok">)</text:span>
</text:p>
      <text:p text:style-name="Preformatted_20_Text">
<text:span text:style-name="NormalTok"><text:s text:c="4"/>title </text:span><text:span text:style-name="OperatorTok">=</text:span><text:span text:style-name="NormalTok"><text:s text:c="1"/>Column(TEXT)</text:span>
</text:p>
      <text:p text:style-name="Preformatted_20_Text">
<text:span text:style-name="NormalTok"><text:s text:c="4"/>author_id </text:span><text:span text:style-name="OperatorTok">=</text:span><text:span text:style-name="NormalTok"><text:s text:c="1"/>Column(TEXT, ForeignKey(</text:span><text:span text:style-name="StringTok">"authors.id"</text:span><text:span text:style-name="NormalTok">))</text:span>
</text:p>
      <text:p text:style-name="Preformatted_20_Text">
<text:span text:style-name="NormalTok"><text:s text:c="4"/>category_id </text:span><text:span text:style-name="OperatorTok">=</text:span><text:span text:style-name="NormalTok"><text:s text:c="1"/>Column(TEXT, ForeignKey(</text:span><text:span text:style-name="StringTok">"categories.id"</text:span><text:span text:style-name="NormalTok">))</text:span>
</text:p>
      <text:p text:style-name="Preformatted_20_Text">
</text:p>
      <text:p text:style-name="Preformatted_20_Text">
<text:span text:style-name="NormalTok"><text:s text:c="4"/>category_rel </text:span><text:span text:style-name="OperatorTok">=</text:span><text:span text:style-name="NormalTok"><text:s text:c="1"/>relationship(</text:span><text:span text:style-name="StringTok">"Category"</text:span><text:span text:style-name="NormalTok">, back_populates</text:span><text:span text:style-name="OperatorTok">=</text:span><text:span text:style-name="StringTok">"books"</text:span><text:span text:style-name="NormalTok">)</text:span>
</text:p>
      <text:p text:style-name="Preformatted_20_Text">
<text:span text:style-name="NormalTok"><text:s text:c="4"/>author_rel </text:span><text:span text:style-name="OperatorTok">=</text:span><text:span text:style-name="NormalTok"><text:s text:c="1"/>relationship(</text:span><text:span text:style-name="StringTok">"Author"</text:span><text:span text:style-name="NormalTok">, back_populates</text:span><text:span text:style-name="OperatorTok">=</text:span><text:span text:style-name="StringTok">"books"</text:span><text:span text:style-name="NormalTok">)</text:span>
</text:p>
      <text:p text:style-name="Preformatted_20_Text">
</text:p>
      <text:p text:style-name="Preformatted_20_Text">
<text:span text:style-name="NormalTok"><text:s text:c="4"/></text:span><text:span text:style-name="AttributeTok">@property</text:span>
</text:p>
      <text:p text:style-name="Preformatted_20_Text">
<text:span text:style-name="NormalTok"><text:s text:c="4"/></text:span><text:span text:style-name="KeywordTok">def</text:span><text:span text:style-name="NormalTok"><text:s text:c="1"/>category(</text:span><text:span text:style-name="VariableTok">self</text:span><text:span text:style-name="NormalTok">):</text:span>
</text:p>
      <text:p text:style-name="Preformatted_20_Text">
<text:span text:style-name="NormalTok"><text:s text:c="8"/></text:span><text:span text:style-name="ControlFlowTok">return</text:span><text:span text:style-name="NormalTok"><text:s text:c="1"/></text:span><text:span text:style-name="VariableTok">self</text:span><text:span text:style-name="NormalTok">.category_rel.name </text:span><text:span text:style-name="ControlFlowTok">if</text:span><text:span text:style-name="NormalTok"><text:s text:c="1"/></text:span><text:span text:style-name="VariableTok">self</text:span><text:span text:style-name="NormalTok">.category_rel </text:span><text:span text:style-name="ControlFlowTok">else</text:span><text:span text:style-name="NormalTok"><text:s text:c="1"/></text:span><text:span text:style-name="VariableTok">None</text:span>
</text:p>
      <text:p text:style-name="First_20_paragraph">File: <text:span text:style-name="Source_Text">server/app/pydantic_schemas/book.py</text:span></text:p>
      <text:p text:style-name="Preformatted_20_Text">
<text:span text:style-name="KeywordTok">class</text:span><text:span text:style-name="NormalTok"><text:s text:c="1"/>BookBase(BaseModel):</text:span>
</text:p>
      <text:p text:style-name="Preformatted_20_Text">
<text:span text:style-name="NormalTok"><text:s text:c="4"/>title: </text:span><text:span text:style-name="BuiltInTok">str</text:span>
</text:p>
      <text:p text:style-name="Preformatted_20_Text">
<text:span text:style-name="NormalTok"><text:s text:c="4"/>author: </text:span><text:span text:style-name="BuiltInTok">str</text:span>
</text:p>
      <text:p text:style-name="Preformatted_20_Text">
<text:span text:style-name="NormalTok"><text:s text:c="4"/>category: </text:span><text:span text:style-name="BuiltInTok">str</text:span>
</text:p>
      <text:p text:style-name="Preformatted_20_Text">
<text:span text:style-name="NormalTok"><text:s text:c="4"/>description: </text:span><text:span text:style-name="BuiltInTok">str</text:span>
</text:p>
      <text:p text:style-name="Preformatted_20_Text">
<text:span text:style-name="NormalTok"><text:s text:c="4"/>rating: </text:span><text:span text:style-name="BuiltInTok">float</text:span>
</text:p>
      <text:p text:style-name="Preformatted_20_Text">
<text:span text:style-name="NormalTok"><text:s text:c="4"/>publication_year: </text:span><text:span text:style-name="BuiltInTok">int</text:span>
</text:p>
      <text:p text:style-name="Preformatted_20_Text">
<text:span text:style-name="NormalTok"><text:s text:c="4"/>copies_owned: </text:span><text:span text:style-name="BuiltInTok">int</text:span>
</text:p>
      <text:p text:style-name="Preformatted_20_Text">
<text:span text:style-name="NormalTok"><text:s text:c="4"/>image: </text:span><text:span text:style-name="BuiltInTok">str</text:span>
</text:p>
      <text:p text:style-name="Preformatted_20_Text">
</text:p>
      <text:p text:style-name="Preformatted_20_Text">
<text:span text:style-name="KeywordTok">class</text:span><text:span text:style-name="NormalTok"><text:s text:c="1"/>Book(BookBase):</text:span>
</text:p>
      <text:p text:style-name="Preformatted_20_Text">
<text:span text:style-name="NormalTok"><text:s text:c="4"/></text:span><text:span text:style-name="BuiltInTok">id</text:span><text:span text:style-name="NormalTok">: </text:span><text:span text:style-name="BuiltInTok">str</text:span>
</text:p>
      <text:p text:style-name="Preformatted_20_Text">
</text:p>
      <text:p text:style-name="Preformatted_20_Text">
<text:span text:style-name="NormalTok"><text:s text:c="4"/>model_config </text:span><text:span text:style-name="OperatorTok">=</text:span><text:span text:style-name="NormalTok"><text:s text:c="1"/>ConfigDict(from_attributes</text:span><text:span text:style-name="OperatorTok">=</text:span><text:span text:style-name="VariableTok">True</text:span><text:span text:style-name="NormalTok">)</text:span>
</text:p>
      <text:p text:style-name="First_20_paragraph">File: <text:span text:style-name="Source_Text">server/app/routers/books.py</text:span></text:p>
      <text:p text:style-name="Preformatted_20_Text">
<text:span text:style-name="KeywordTok">def</text:span><text:span text:style-name="NormalTok"><text:s text:c="1"/>_book_to_response(book_obj: book_model.Book) </text:span><text:span text:style-name="OperatorTok">-&gt;</text:span><text:span text:style-name="NormalTok"><text:s text:c="1"/>book_schema.Book:</text:span>
</text:p>
      <text:p text:style-name="Preformatted_20_Text">
<text:span text:style-name="NormalTok"><text:s text:c="4"/></text:span><text:span text:style-name="ControlFlowTok">return</text:span><text:span text:style-name="NormalTok"><text:s text:c="1"/>book_schema.Book(</text:span>
</text:p>
      <text:p text:style-name="Preformatted_20_Text">
<text:span text:style-name="NormalTok"><text:s text:c="8"/></text:span><text:span text:style-name="BuiltInTok">id</text:span><text:span text:style-name="OperatorTok">=</text:span><text:span text:style-name="BuiltInTok">str</text:span><text:span text:style-name="NormalTok">(book_obj.</text:span><text:span text:style-name="BuiltInTok">id</text:span><text:span text:style-name="NormalTok">),</text:span>
</text:p>
      <text:p text:style-name="Preformatted_20_Text">
<text:span text:style-name="NormalTok"><text:s text:c="8"/>title</text:span><text:span text:style-name="OperatorTok">=</text:span><text:span text:style-name="BuiltInTok">str</text:span><text:span text:style-name="NormalTok">(book_obj.title </text:span><text:span text:style-name="KeywordTok">or</text:span><text:span text:style-name="NormalTok"><text:s text:c="1"/></text:span><text:span text:style-name="StringTok">""</text:span><text:span text:style-name="NormalTok">),</text:span>
</text:p>
      <text:p text:style-name="Preformatted_20_Text">
<text:span text:style-name="NormalTok"><text:s text:c="8"/>author</text:span><text:span text:style-name="OperatorTok">=</text:span><text:span text:style-name="BuiltInTok">str</text:span><text:span text:style-name="NormalTok">(book_obj.author </text:span><text:span text:style-name="KeywordTok">or</text:span><text:span text:style-name="NormalTok"><text:s text:c="1"/></text:span><text:span text:style-name="StringTok">""</text:span><text:span text:style-name="NormalTok">),</text:span>
</text:p>
      <text:p text:style-name="Preformatted_20_Text">
<text:span text:style-name="NormalTok"><text:s text:c="8"/>category</text:span><text:span text:style-name="OperatorTok">=</text:span><text:span text:style-name="BuiltInTok">str</text:span><text:span text:style-name="NormalTok">(book_obj.category </text:span><text:span text:style-name="KeywordTok">or</text:span><text:span text:style-name="NormalTok"><text:s text:c="1"/></text:span><text:span text:style-name="StringTok">""</text:span><text:span text:style-name="NormalTok">),</text:span>
</text:p>
      <text:p text:style-name="Preformatted_20_Text">
<text:span text:style-name="NormalTok"><text:s text:c="8"/>description</text:span><text:span text:style-name="OperatorTok">=</text:span><text:span text:style-name="BuiltInTok">str</text:span><text:span text:style-name="NormalTok">(book_obj.description </text:span><text:span text:style-name="KeywordTok">or</text:span><text:span text:style-name="NormalTok"><text:s text:c="1"/></text:span><text:span text:style-name="StringTok">""</text:span><text:span text:style-name="NormalTok">),</text:span>
</text:p>
      <text:p text:style-name="Preformatted_20_Text">
<text:span text:style-name="NormalTok"><text:s text:c="8"/>rating</text:span><text:span text:style-name="OperatorTok">=</text:span><text:span text:style-name="NormalTok">(</text:span>
</text:p>
      <text:p text:style-name="Preformatted_20_Text">
<text:span text:style-name="NormalTok"><text:s text:c="12"/></text:span><text:span text:style-name="BuiltInTok">float</text:span><text:span text:style-name="NormalTok">(cast(</text:span><text:span text:style-name="BuiltInTok">float</text:span><text:span text:style-name="NormalTok">, book_obj.rating)) </text:span><text:span text:style-name="ControlFlowTok">if</text:span><text:span text:style-name="NormalTok"><text:s text:c="1"/>book_obj.rating </text:span><text:span text:style-name="KeywordTok">is</text:span><text:span text:style-name="NormalTok"><text:s text:c="1"/></text:span><text:span text:style-name="KeywordTok">not</text:span><text:span text:style-name="NormalTok"><text:s text:c="1"/></text:span><text:span text:style-name="VariableTok">None</text:span><text:span text:style-name="NormalTok"><text:s text:c="1"/></text:span><text:span text:style-name="ControlFlowTok">else</text:span><text:span text:style-name="NormalTok"><text:s text:c="1"/></text:span><text:span text:style-name="FloatTok">0.0</text:span>
</text:p>
      <text:p text:style-name="Preformatted_20_Text">
<text:span text:style-name="NormalTok"><text:s text:c="8"/>),</text:span>
</text:p>
      <text:p text:style-name="Preformatted_20_Text">
<text:span text:style-name="NormalTok"><text:s text:c="8"/>publication_year</text:span><text:span text:style-name="OperatorTok">=</text:span><text:span text:style-name="NormalTok">(</text:span>
</text:p>
      <text:p text:style-name="Preformatted_20_Text">
<text:span text:style-name="NormalTok"><text:s text:c="12"/></text:span><text:span text:style-name="BuiltInTok">int</text:span><text:span text:style-name="NormalTok">(cast(</text:span><text:span text:style-name="BuiltInTok">int</text:span><text:span text:style-name="NormalTok">, book_obj.publication_year))</text:span>
</text:p>
      <text:p text:style-name="Preformatted_20_Text">
<text:span text:style-name="NormalTok"><text:s text:c="12"/></text:span><text:span text:style-name="ControlFlowTok">if</text:span><text:span text:style-name="NormalTok"><text:s text:c="1"/>book_obj.publication_year </text:span><text:span text:style-name="KeywordTok">is</text:span><text:span text:style-name="NormalTok"><text:s text:c="1"/></text:span><text:span text:style-name="KeywordTok">not</text:span><text:span text:style-name="NormalTok"><text:s text:c="1"/></text:span><text:span text:style-name="VariableTok">None</text:span>
</text:p>
      <text:p text:style-name="Preformatted_20_Text">
<text:span text:style-name="NormalTok"><text:s text:c="12"/></text:span><text:span text:style-name="ControlFlowTok">else</text:span><text:span text:style-name="NormalTok"><text:s text:c="1"/></text:span><text:span text:style-name="DecValTok">0</text:span>
</text:p>
      <text:p text:style-name="Preformatted_20_Text">
<text:span text:style-name="NormalTok"><text:s text:c="8"/>),</text:span>
</text:p>
      <text:p text:style-name="Preformatted_20_Text">
<text:span text:style-name="NormalTok"><text:s text:c="8"/>copies_owned</text:span><text:span text:style-name="OperatorTok">=</text:span><text:span text:style-name="NormalTok">(</text:span>
</text:p>
      <text:p text:style-name="Preformatted_20_Text">
<text:span text:style-name="NormalTok"><text:s text:c="12"/></text:span><text:span text:style-name="BuiltInTok">int</text:span><text:span text:style-name="NormalTok">(cast(</text:span><text:span text:style-name="BuiltInTok">int</text:span><text:span text:style-name="NormalTok">, book_obj.copies_owned))</text:span>
</text:p>
      <text:p text:style-name="Preformatted_20_Text">
<text:span text:style-name="NormalTok"><text:s text:c="12"/></text:span><text:span text:style-name="ControlFlowTok">if</text:span><text:span text:style-name="NormalTok"><text:s text:c="1"/>book_obj.copies_owned </text:span><text:span text:style-name="KeywordTok">is</text:span><text:span text:style-name="NormalTok"><text:s text:c="1"/></text:span><text:span text:style-name="KeywordTok">not</text:span><text:span text:style-name="NormalTok"><text:s text:c="1"/></text:span><text:span text:style-name="VariableTok">None</text:span>
</text:p>
      <text:p text:style-name="Preformatted_20_Text">
<text:span text:style-name="NormalTok"><text:s text:c="12"/></text:span><text:span text:style-name="ControlFlowTok">else</text:span><text:span text:style-name="NormalTok"><text:s text:c="1"/></text:span><text:span text:style-name="DecValTok">0</text:span>
</text:p>
      <text:p text:style-name="Preformatted_20_Text">
<text:span text:style-name="NormalTok"><text:s text:c="8"/>),</text:span>
</text:p>
      <text:p text:style-name="Preformatted_20_Text">
<text:span text:style-name="NormalTok"><text:s text:c="8"/>image</text:span><text:span text:style-name="OperatorTok">=</text:span><text:span text:style-name="BuiltInTok">str</text:span><text:span text:style-name="NormalTok">(book_obj.image </text:span><text:span text:style-name="KeywordTok">or</text:span><text:span text:style-name="NormalTok"><text:s text:c="1"/></text:span><text:span text:style-name="StringTok">""</text:span><text:span text:style-name="NormalTok">),</text:span>
</text:p>
      <text:p text:style-name="Preformatted_20_Text">
<text:span text:style-name="NormalTok"><text:s text:c="8"/>language</text:span><text:span text:style-name="OperatorTok">=</text:span><text:span text:style-name="BuiltInTok">str</text:span><text:span text:style-name="NormalTok">(book_obj.language </text:span><text:span text:style-name="KeywordTok">or</text:span><text:span text:style-name="NormalTok"><text:s text:c="1"/></text:span><text:span text:style-name="StringTok">"English"</text:span><text:span text:style-name="NormalTok">),</text:span>
</text:p>
      <text:p text:style-name="Preformatted_20_Text">
<text:span text:style-name="NormalTok"><text:s text:c="8"/>pages</text:span><text:span text:style-name="OperatorTok">=</text:span><text:span text:style-name="NormalTok">(</text:span><text:span text:style-name="BuiltInTok">int</text:span><text:span text:style-name="NormalTok">(cast(</text:span><text:span text:style-name="BuiltInTok">int</text:span><text:span text:style-name="NormalTok">, book_obj.pages)) </text:span><text:span text:style-name="ControlFlowTok">if</text:span><text:span text:style-name="NormalTok"><text:s text:c="1"/>book_obj.pages </text:span><text:span text:style-name="KeywordTok">is</text:span><text:span text:style-name="NormalTok"><text:s text:c="1"/></text:span><text:span text:style-name="KeywordTok">not</text:span><text:span text:style-name="NormalTok"><text:s text:c="1"/></text:span><text:span text:style-name="VariableTok">None</text:span><text:span text:style-name="NormalTok"><text:s text:c="1"/></text:span><text:span text:style-name="ControlFlowTok">else</text:span><text:span text:style-name="NormalTok"><text:s text:c="1"/></text:span><text:span text:style-name="DecValTok">200</text:span><text:span text:style-name="NormalTok">),</text:span>
</text:p>
      <text:p text:style-name="Preformatted_20_Text">
<text:span text:style-name="NormalTok"><text:s text:c="8"/>rating_count</text:span><text:span text:style-name="OperatorTok">=</text:span><text:span text:style-name="NormalTok">(</text:span>
</text:p>
      <text:p text:style-name="Preformatted_20_Text">
<text:span text:style-name="NormalTok"><text:s text:c="12"/></text:span><text:span text:style-name="BuiltInTok">int</text:span><text:span text:style-name="NormalTok">(cast(</text:span><text:span text:style-name="BuiltInTok">int</text:span><text:span text:style-name="NormalTok">, book_obj.rating_count))</text:span>
</text:p>
      <text:p text:style-name="Preformatted_20_Text">
<text:span text:style-name="NormalTok"><text:s text:c="12"/></text:span><text:span text:style-name="ControlFlowTok">if</text:span><text:span text:style-name="NormalTok"><text:s text:c="1"/>book_obj.rating_count </text:span><text:span text:style-name="KeywordTok">is</text:span><text:span text:style-name="NormalTok"><text:s text:c="1"/></text:span><text:span text:style-name="KeywordTok">not</text:span><text:span text:style-name="NormalTok"><text:s text:c="1"/></text:span><text:span text:style-name="VariableTok">None</text:span>
</text:p>
      <text:p text:style-name="Preformatted_20_Text">
<text:span text:style-name="NormalTok"><text:s text:c="12"/></text:span><text:span text:style-name="ControlFlowTok">else</text:span><text:span text:style-name="NormalTok"><text:s text:c="1"/></text:span><text:span text:style-name="DecValTok">0</text:span>
</text:p>
      <text:p text:style-name="Preformatted_20_Text">
<text:span text:style-name="NormalTok"><text:s text:c="8"/>),</text:span>
</text:p>
      <text:p text:style-name="Preformatted_20_Text">
<text:span text:style-name="NormalTok"><text:s text:c="4"/>)</text:span>
</text:p>
      <text:h text:style-name="Heading_20_3" text:outline-level="3"><text:bookmark-start text:name="clear-conclusion-9"/>Clear conclusion<text:bookmark-end text:name="clear-conclusion-9"/></text:h>
      <text:p text:style-name="First_20_paragraph">This is a clean model/schema/mapping separation. It is very close to a Data Mapper plus DTO approach.</text:p>
      <text:h text:style-name="Heading_20_2" text:outline-level="2"><text:bookmark-start text:name="middleware-pipeline-pattern"/>4.5 Middleware Pipeline Pattern<text:bookmark-end text:name="middleware-pipeline-pattern"/></text:h>
      <text:h text:style-name="Heading_20_3" text:outline-level="3"><text:bookmark-start text:name="what-it-is-10"/>What it is<text:bookmark-end text:name="what-it-is-10"/></text:h>
      <text:p text:style-name="First_20_paragraph">Middleware creates a request-processing pipeline. Each middleware layer can inspect, reject, modify, or pass along the request/response.</text:p>
      <text:h text:style-name="Heading_20_3" text:outline-level="3"><text:bookmark-start text:name="why-your-code-matches-this-10"/>Why your code matches this<text:bookmark-end text:name="why-your-code-matches-this-10"/></text:h>
      <text:p text:style-name="First_20_paragraph">Your backend has:</text:p>
      <text:list text:style-name="L12">
        <text:list-item>
          <text:p text:style-name="P33">CORS middleware</text:p>
        </text:list-item>
        <text:list-item>
          <text:p text:style-name="P33">max body size middleware</text:p>
        </text:list-item>
        <text:list-item>
          <text:p text:style-name="P33">security header middleware</text:p>
        </text:list-item>
      </text:list>
      <text:p text:style-name="First_20_paragraph">These form a request pipeline before the route handler runs.</text:p>
      <text:h text:style-name="Heading_20_3" text:outline-level="3"><text:bookmark-start text:name="code-evidence-9"/>Code evidence<text:bookmark-end text:name="code-evidence-9"/></text:h>
      <text:p text:style-name="First_20_paragraph">File: <text:span text:style-name="Source_Text">server/app/app_factory.py</text:span></text:p>
      <text:p text:style-name="Preformatted_20_Text">
<text:span text:style-name="NormalTok">app.add_middleware(</text:span>
</text:p>
      <text:p text:style-name="Preformatted_20_Text">
<text:span text:style-name="NormalTok"><text:s text:c="4"/>CORSMiddleware,</text:span>
</text:p>
      <text:p text:style-name="Preformatted_20_Text">
<text:span text:style-name="NormalTok"><text:s text:c="4"/>allow_origins</text:span><text:span text:style-name="OperatorTok">=</text:span><text:span text:style-name="NormalTok">allowed_origins,</text:span>
</text:p>
      <text:p text:style-name="Preformatted_20_Text">
<text:span text:style-name="NormalTok"><text:s text:c="4"/>allow_credentials</text:span><text:span text:style-name="OperatorTok">=</text:span><text:span text:style-name="NormalTok">allow_credentials,</text:span>
</text:p>
      <text:p text:style-name="Preformatted_20_Text">
<text:span text:style-name="NormalTok"><text:s text:c="4"/>allow_methods</text:span><text:span text:style-name="OperatorTok">=</text:span><text:span text:style-name="NormalTok">[</text:span><text:span text:style-name="StringTok">"GET"</text:span><text:span text:style-name="NormalTok">, </text:span><text:span text:style-name="StringTok">"POST"</text:span><text:span text:style-name="NormalTok">, </text:span><text:span text:style-name="StringTok">"PUT"</text:span><text:span text:style-name="NormalTok">, </text:span><text:span text:style-name="StringTok">"DELETE"</text:span><text:span text:style-name="NormalTok">, </text:span><text:span text:style-name="StringTok">"PATCH"</text:span><text:span text:style-name="NormalTok">, </text:span><text:span text:style-name="StringTok">"OPTIONS"</text:span><text:span text:style-name="NormalTok">, </text:span><text:span text:style-name="StringTok">"HEAD"</text:span><text:span text:style-name="NormalTok">],</text:span>
</text:p>
      <text:p text:style-name="Preformatted_20_Text">
<text:span text:style-name="NormalTok"><text:s text:c="4"/>allow_headers</text:span><text:span text:style-name="OperatorTok">=</text:span><text:span text:style-name="NormalTok">[</text:span><text:span text:style-name="StringTok">"*"</text:span><text:span text:style-name="NormalTok">],</text:span>
</text:p>
      <text:p text:style-name="Preformatted_20_Text">
<text:span text:style-name="NormalTok">)</text:span>
</text:p>
      <text:p text:style-name="Preformatted_20_Text">
</text:p>
      <text:p text:style-name="Preformatted_20_Text">
<text:span text:style-name="NormalTok">app.add_middleware(</text:span>
</text:p>
      <text:p text:style-name="Preformatted_20_Text">
<text:span text:style-name="NormalTok"><text:s text:c="4"/>MaxRequestBodySizeMiddleware, max_body_size</text:span><text:span text:style-name="OperatorTok">=</text:span><text:span text:style-name="NormalTok">max_request_size_bytes</text:span>
</text:p>
      <text:p text:style-name="Preformatted_20_Text">
<text:span text:style-name="NormalTok">)</text:span>
</text:p>
      <text:p text:style-name="Preformatted_20_Text">
</text:p>
      <text:p text:style-name="Preformatted_20_Text">
<text:span text:style-name="AttributeTok">@app.middleware</text:span><text:span text:style-name="NormalTok">(</text:span><text:span text:style-name="StringTok">"http"</text:span><text:span text:style-name="NormalTok">)</text:span>
</text:p>
      <text:p text:style-name="Preformatted_20_Text">
<text:span text:style-name="ControlFlowTok">async</text:span><text:span text:style-name="NormalTok"><text:s text:c="1"/></text:span><text:span text:style-name="KeywordTok">def</text:span><text:span text:style-name="NormalTok"><text:s text:c="1"/>security_headers_middleware(request: Request, call_next):</text:span>
</text:p>
      <text:p text:style-name="Preformatted_20_Text">
<text:span text:style-name="NormalTok"><text:s text:c="4"/>content_length </text:span><text:span text:style-name="OperatorTok">=</text:span><text:span text:style-name="NormalTok"><text:s text:c="1"/>request.headers.get(</text:span><text:span text:style-name="StringTok">"content-length"</text:span><text:span text:style-name="NormalTok">)</text:span>
</text:p>
      <text:p text:style-name="Preformatted_20_Text">
<text:span text:style-name="NormalTok"><text:s text:c="4"/></text:span><text:span text:style-name="ControlFlowTok">if</text:span><text:span text:style-name="NormalTok"><text:s text:c="1"/>content_length </text:span><text:span text:style-name="KeywordTok">and</text:span><text:span text:style-name="NormalTok"><text:s text:c="1"/>content_length.isdigit():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BuiltInTok">int</text:span><text:span text:style-name="NormalTok">(content_length) </text:span><text:span text:style-name="OperatorTok">&gt;</text:span><text:span text:style-name="NormalTok"><text:s text:c="1"/>max_request_size_bytes:</text:span>
</text:p>
      <text:p text:style-name="Preformatted_20_Text">
<text:span text:style-name="NormalTok"><text:s text:c="12"/></text:span><text:span text:style-name="ControlFlowTok">return</text:span><text:span text:style-name="NormalTok"><text:s text:c="1"/>JSONResponse(</text:span>
</text:p>
      <text:p text:style-name="Preformatted_20_Text">
<text:span text:style-name="NormalTok"><text:s text:c="16"/>status_code</text:span><text:span text:style-name="OperatorTok">=</text:span><text:span text:style-name="DecValTok">413</text:span><text:span text:style-name="NormalTok">,</text:span>
</text:p>
      <text:p text:style-name="Preformatted_20_Text">
<text:span text:style-name="NormalTok"><text:s text:c="16"/>content</text:span><text:span text:style-name="OperatorTok">=</text:span><text:span text:style-name="NormalTok">{</text:span><text:span text:style-name="StringTok">"detail"</text:span><text:span text:style-name="NormalTok">: </text:span><text:span text:style-name="StringTok">"Request body too large"</text:span><text:span text:style-name="NormalTok">},</text:span>
</text:p>
      <text:p text:style-name="Preformatted_20_Text">
<text:span text:style-name="NormalTok"><text:s text:c="12"/>)</text:span>
</text:p>
      <text:p text:style-name="Preformatted_20_Text">
</text:p>
      <text:p text:style-name="Preformatted_20_Text">
<text:span text:style-name="NormalTok"><text:s text:c="4"/>response </text:span><text:span text:style-name="OperatorTok">=</text:span><text:span text:style-name="NormalTok"><text:s text:c="1"/></text:span><text:span text:style-name="ControlFlowTok">await</text:span><text:span text:style-name="NormalTok"><text:s text:c="1"/>call_next(request)</text:span>
</text:p>
      <text:p text:style-name="Preformatted_20_Text">
<text:span text:style-name="NormalTok"><text:s text:c="4"/>response.headers.setdefault(</text:span><text:span text:style-name="StringTok">"X-Content-Type-Options"</text:span><text:span text:style-name="NormalTok">, </text:span><text:span text:style-name="StringTok">"nosniff"</text:span><text:span text:style-name="NormalTok">)</text:span>
</text:p>
      <text:p text:style-name="Preformatted_20_Text">
<text:span text:style-name="NormalTok"><text:s text:c="4"/>response.headers.setdefault(</text:span><text:span text:style-name="StringTok">"X-Frame-Options"</text:span><text:span text:style-name="NormalTok">, </text:span><text:span text:style-name="StringTok">"DENY"</text:span><text:span text:style-name="NormalTok">)</text:span>
</text:p>
      <text:p text:style-name="Preformatted_20_Text">
<text:span text:style-name="NormalTok"><text:s text:c="4"/>response.headers.setdefault(</text:span><text:span text:style-name="StringTok">"Referrer-Policy"</text:span><text:span text:style-name="NormalTok">, </text:span><text:span text:style-name="StringTok">"no-referrer"</text:span><text:span text:style-name="NormalTok">)</text:span>
</text:p>
      <text:p text:style-name="Preformatted_20_Text">
<text:span text:style-name="NormalTok"><text:s text:c="4"/></text:span><text:span text:style-name="ControlFlowTok">return</text:span><text:span text:style-name="NormalTok"><text:s text:c="1"/>response</text:span>
</text:p>
      <text:h text:style-name="Heading_20_3" text:outline-level="3"><text:bookmark-start text:name="clear-conclusion-10"/>Clear conclusion<text:bookmark-end text:name="clear-conclusion-10"/></text:h>
      <text:p text:style-name="First_20_paragraph">Yes, the backend uses a middleware pipeline pattern.</text:p>
      <text:h text:style-name="Heading_20_2" text:outline-level="2"><text:bookmark-start text:name="application-lifecycle-lifespan-hook-pattern"/>4.6 Application Lifecycle / Lifespan Hook Pattern<text:bookmark-end text:name="application-lifecycle-lifespan-hook-pattern"/></text:h>
      <text:h text:style-name="Heading_20_3" text:outline-level="3"><text:bookmark-start text:name="what-it-is-11"/>What it is<text:bookmark-end text:name="what-it-is-11"/></text:h>
      <text:p text:style-name="First_20_paragraph">This pattern centralizes startup and shutdown work.</text:p>
      <text:h text:style-name="Heading_20_3" text:outline-level="3"><text:bookmark-start text:name="why-your-code-matches-this-11"/>Why your code matches this<text:bookmark-end text:name="why-your-code-matches-this-11"/></text:h>
      <text:p text:style-name="First_20_paragraph">Your backend uses a lifespan context manager to initialize database metadata on startup.</text:p>
      <text:h text:style-name="Heading_20_3" text:outline-level="3"><text:bookmark-start text:name="code-evidence-10"/>Code evidence<text:bookmark-end text:name="code-evidence-10"/></text:h>
      <text:p text:style-name="First_20_paragraph">File: <text:span text:style-name="Source_Text">server/app/startup.py</text:span></text:p>
      <text:p text:style-name="Preformatted_20_Text">
<text:span text:style-name="AttributeTok">@asynccontextmanager</text:span>
</text:p>
      <text:p text:style-name="Preformatted_20_Text">
<text:span text:style-name="ControlFlowTok">async</text:span><text:span text:style-name="NormalTok"><text:s text:c="1"/></text:span><text:span text:style-name="KeywordTok">def</text:span><text:span text:style-name="NormalTok"><text:s text:c="1"/>lifespan(app: FastAPI):</text:span>
</text:p>
      <text:p text:style-name="Preformatted_20_Text">
<text:span text:style-name="NormalTok"><text:s text:c="4"/>Base.metadata.create_all(bind</text:span><text:span text:style-name="OperatorTok">=</text:span><text:span text:style-name="NormalTok">engine)</text:span>
</text:p>
      <text:p text:style-name="Preformatted_20_Text">
<text:span text:style-name="NormalTok"><text:s text:c="4"/></text:span><text:span text:style-name="ControlFlowTok">yield</text:span>
</text:p>
      <text:h text:style-name="Heading_20_3" text:outline-level="3"><text:bookmark-start text:name="clear-conclusion-11"/>Clear conclusion<text:bookmark-end text:name="clear-conclusion-11"/></text:h>
      <text:p text:style-name="First_20_paragraph">This is a valid application lifecycle pattern, often used together with an application factory.</text:p>
      <text:h text:style-name="Heading_20_2" text:outline-level="2"><text:bookmark-start text:name="next.js-admin-patterns"/>5. Next.js Admin Patterns<text:bookmark-end text:name="next.js-admin-patterns"/></text:h>
      <text:h text:style-name="Heading_20_2" text:outline-level="2"><text:bookmark-start text:name="react-context-provider-pattern"/>5.1 React Context + Provider Pattern<text:bookmark-end text:name="react-context-provider-pattern"/></text:h>
      <text:h text:style-name="Heading_20_3" text:outline-level="3"><text:bookmark-start text:name="what-it-is-12"/>What it is<text:bookmark-end text:name="what-it-is-12"/></text:h>
      <text:p text:style-name="First_20_paragraph">React Context provides shared state and behavior to the component tree without prop-drilling.</text:p>
      <text:h text:style-name="Heading_20_3" text:outline-level="3"><text:bookmark-start text:name="why-your-code-matches-this-12"/>Why your code matches this<text:bookmark-end text:name="why-your-code-matches-this-12"/></text:h>
      <text:p text:style-name="First_20_paragraph">Your admin app uses an <text:span text:style-name="Source_Text">AuthContext</text:span> and exposes it through an <text:span text:style-name="Source_Text">AuthProvider</text:span>. That provider is applied globally in <text:span text:style-name="Source_Text">app/providers.tsx</text:span>.</text:p>
      <text:h text:style-name="Heading_20_3" text:outline-level="3"><text:bookmark-start text:name="code-evidence-11"/>Code evidence<text:bookmark-end text:name="code-evidence-11"/></text:h>
      <text:p text:style-name="First_20_paragraph">File: <text:span text:style-name="Source_Text">admin/lib/auth/auth-context.tsx</text:span></text:p>
      <text:p text:style-name="P34">const AuthContext = createContext&lt;AuthContextType | undefined&gt;(undefined);</text:p>
      <text:p text:style-name="P35"/>
      <text:p text:style-name="P36">export function AuthProvider({ children }: { children: ReactNode }) {</text:p>
      <text:p text:style-name="P37"><text:s text:c="2"/>const [user, setUser] = useState&lt;User | null&gt;(null);</text:p>
      <text:p text:style-name="P38"><text:s text:c="2"/>const [isAuthenticated, setIsAuthenticated] = useState(false);</text:p>
      <text:p text:style-name="P39"><text:s text:c="2"/>const [isLoading, setIsLoading] = useState(true);</text:p>
      <text:p text:style-name="P40"/>
      <text:p text:style-name="P41"><text:s text:c="2"/>useEffect(() =&gt; {</text:p>
      <text:p text:style-name="P42"><text:s text:c="4"/>const checkSession = async () =&gt; {</text:p>
      <text:p text:style-name="P43"><text:s text:c="6"/>try {</text:p>
      <text:p text:style-name="P44"><text:s text:c="8"/>const res = await fetch("/api/auth/me", { credentials: "include" });</text:p>
      <text:p text:style-name="P45"><text:s text:c="8"/>if (res.ok) {</text:p>
      <text:p text:style-name="P46"><text:s text:c="10"/>const data = await res.json();</text:p>
      <text:p text:style-name="P47"><text:s text:c="10"/>if (data.authenticated &amp;&amp; data.user) {</text:p>
      <text:p text:style-name="P48"><text:s text:c="12"/>setUser(data.user);</text:p>
      <text:p text:style-name="P49"><text:s text:c="12"/>setIsAuthenticated(true);</text:p>
      <text:p text:style-name="P50"><text:s text:c="10"/>}</text:p>
      <text:p text:style-name="P51"><text:s text:c="8"/>}</text:p>
      <text:p text:style-name="P52"><text:s text:c="6"/>} finally {</text:p>
      <text:p text:style-name="P53"><text:s text:c="8"/>setIsLoading(false);</text:p>
      <text:p text:style-name="P54"><text:s text:c="6"/>}</text:p>
      <text:p text:style-name="P55"><text:s text:c="4"/>};</text:p>
      <text:p text:style-name="P56"/>
      <text:p text:style-name="P57"><text:s text:c="4"/>checkSession();</text:p>
      <text:p text:style-name="P58"><text:s text:c="2"/>}, []);</text:p>
      <text:p text:style-name="P59"/>
      <text:p text:style-name="P60"><text:s text:c="2"/>return (</text:p>
      <text:p text:style-name="P61"><text:s text:c="4"/>&lt;AuthContext.Provider</text:p>
      <text:p text:style-name="P62"><text:s text:c="6"/>value={{</text:p>
      <text:p text:style-name="P63"><text:s text:c="8"/>user,</text:p>
      <text:p text:style-name="P64"><text:s text:c="8"/>isAuthenticated,</text:p>
      <text:p text:style-name="P65"><text:s text:c="8"/>isLoading,</text:p>
      <text:p text:style-name="P66"><text:s text:c="8"/>login,</text:p>
      <text:p text:style-name="P67"><text:s text:c="8"/>logout,</text:p>
      <text:p text:style-name="P68"><text:s text:c="6"/>}}</text:p>
      <text:p text:style-name="P69"><text:s text:c="4"/>&gt;</text:p>
      <text:p text:style-name="P70"><text:s text:c="6"/>{children}</text:p>
      <text:p text:style-name="P71"><text:s text:c="4"/>&lt;/AuthContext.Provider&gt;</text:p>
      <text:p text:style-name="P72"><text:s text:c="2"/>);</text:p>
      <text:p text:style-name="P73">}</text:p>
      <text:p text:style-name="First_20_paragraph">File: <text:span text:style-name="Source_Text">admin/app/providers.tsx</text:span></text:p>
      <text:p text:style-name="P74">export function Providers({ children }: { children: ReactNode }) {</text:p>
      <text:p text:style-name="P75"><text:s text:c="2"/>return &lt;AuthProvider&gt;{children}&lt;/AuthProvider&gt;;</text:p>
      <text:p text:style-name="P76">}</text:p>
      <text:h text:style-name="Heading_20_3" text:outline-level="3"><text:bookmark-start text:name="clear-conclusion-12"/>Clear conclusion<text:bookmark-end text:name="clear-conclusion-12"/></text:h>
      <text:p text:style-name="First_20_paragraph">Yes, the admin app uses the Context + Provider pattern for authentication state.</text:p>
      <text:h text:style-name="Heading_20_2" text:outline-level="2"><text:bookmark-start text:name="layout-composition-pattern"/>5.2 Layout Composition Pattern<text:bookmark-end text:name="layout-composition-pattern"/></text:h>
      <text:h text:style-name="Heading_20_3" text:outline-level="3"><text:bookmark-start text:name="what-it-is-13"/>What it is<text:bookmark-end text:name="what-it-is-13"/></text:h>
      <text:p text:style-name="First_20_paragraph">Layout composition means the app builds pages by composing shared layout shells and reusable UI blocks.</text:p>
      <text:h text:style-name="Heading_20_3" text:outline-level="3"><text:bookmark-start text:name="why-your-code-matches-this-13"/>Why your code matches this<text:bookmark-end text:name="why-your-code-matches-this-13"/></text:h>
      <text:p text:style-name="First_20_paragraph">The dashboard layout wraps all dashboard pages with a sidebar shell. This is a clean composition pattern.</text:p>
      <text:h text:style-name="Heading_20_3" text:outline-level="3"><text:bookmark-start text:name="code-evidence-12"/>Code evidence<text:bookmark-end text:name="code-evidence-12"/></text:h>
      <text:p text:style-name="First_20_paragraph">File: <text:span text:style-name="Source_Text">admin/app/(dashboard)/layout.tsx</text:span></text:p>
      <text:p text:style-name="P77">export default function DashboardLayout({</text:p>
      <text:p text:style-name="P78"><text:s text:c="2"/>children,</text:p>
      <text:p text:style-name="P79">}: {</text:p>
      <text:p text:style-name="P80"><text:s text:c="2"/>children: React.ReactNode;</text:p>
      <text:p text:style-name="P81">}) {</text:p>
      <text:p text:style-name="P82"><text:s text:c="2"/>return (</text:p>
      <text:p text:style-name="P83"><text:s text:c="4"/>&lt;div className="min-h-screen bg-gray-50"&gt;</text:p>
      <text:p text:style-name="P84"><text:s text:c="6"/>&lt;Sidebar /&gt;</text:p>
      <text:p text:style-name="P85"><text:s text:c="6"/>&lt;main className="min-h-screen lg:pl-64"&gt;{children}&lt;/main&gt;</text:p>
      <text:p text:style-name="P86"><text:s text:c="4"/>&lt;/div&gt;</text:p>
      <text:p text:style-name="P87"><text:s text:c="2"/>);</text:p>
      <text:p text:style-name="P88">}</text:p>
      <text:h text:style-name="Heading_20_3" text:outline-level="3"><text:bookmark-start text:name="clear-conclusion-13"/>Clear conclusion<text:bookmark-end text:name="clear-conclusion-13"/></text:h>
      <text:p text:style-name="First_20_paragraph">The admin UI uses component composition and shared layout shells in a clear way.</text:p>
      <text:h text:style-name="Heading_20_2" text:outline-level="2"><text:bookmark-start text:name="transaction-script-pattern"/>5.3 Transaction Script Pattern<text:bookmark-end text:name="transaction-script-pattern"/></text:h>
      <text:h text:style-name="Heading_20_3" text:outline-level="3"><text:bookmark-start text:name="what-it-is-14"/>What it is<text:bookmark-end text:name="what-it-is-14"/></text:h>
      <text:p text:style-name="First_20_paragraph">The Transaction Script pattern puts request logic directly inside route handlers instead of moving it into a deep service/domain layer.</text:p>
      <text:h text:style-name="Heading_20_3" text:outline-level="3"><text:bookmark-start text:name="why-your-code-matches-this-14"/>Why your code matches this<text:bookmark-end text:name="why-your-code-matches-this-14"/></text:h>
      <text:p text:style-name="First_20_paragraph">Your admin route handlers often:</text:p>
      <text:list text:style-name="L13">
        <text:list-item>
          <text:p text:style-name="P89">read request parameters</text:p>
        </text:list-item>
        <text:list-item>
          <text:p text:style-name="P89">run SQL</text:p>
        </text:list-item>
        <text:list-item>
          <text:p text:style-name="P89">validate input</text:p>
        </text:list-item>
        <text:list-item>
          <text:p text:style-name="P89">transform the result</text:p>
        </text:list-item>
        <text:list-item>
          <text:p text:style-name="P89">return JSON</text:p>
        </text:list-item>
      </text:list>
      <text:p text:style-name="First_20_paragraph">all inside one route file.</text:p>
      <text:h text:style-name="Heading_20_3" text:outline-level="3"><text:bookmark-start text:name="code-evidence-13"/>Code evidence<text:bookmark-end text:name="code-evidence-13"/></text:h>
      <text:p text:style-name="First_20_paragraph">File: <text:span text:style-name="Source_Text">admin/app/api/dashboard/route.ts</text:span></text:p>
      <text:p text:style-name="Preformatted_20_Text">
<text:span text:style-name="ImportTok">export</text:span><text:span text:style-name="NormalTok"><text:s text:c="1"/></text:span><text:span text:style-name="KeywordTok">async</text:span><text:span text:style-name="NormalTok"><text:s text:c="1"/></text:span><text:span text:style-name="KeywordTok">function</text:span><text:span text:style-name="NormalTok"><text:s text:c="1"/></text:span><text:span text:style-name="FunctionTok">GET</text:span><text:span text:style-name="NormalTok">() {</text:span>
</text:p>
      <text:p text:style-name="Preformatted_20_Text">
<text:span text:style-name="NormalTok"><text:s text:c="2"/></text:span><text:span text:style-name="ControlFlowTok">try</text:span><text:span text:style-name="NormalTok"><text:s text:c="1"/>{</text:span>
</text:p>
      <text:p text:style-name="Preformatted_20_Text">
<text:span text:style-name="NormalTok"><text:s text:c="4"/></text:span><text:span text:style-name="ControlFlowTok">await</text:span><text:span text:style-name="NormalTok"><text:s text:c="1"/></text:span><text:span text:style-name="FunctionTok">ensureFineInfrastructure</text:span><text:span text:style-name="NormalTok">()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KeywordTok">const</text:span><text:span text:style-name="NormalTok"><text:s text:c="1"/>usersResult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queryOne</text:span><text:span text:style-name="OperatorTok">&lt;</text:span><text:span text:style-name="NormalTok">{ count</text:span><text:span text:style-name="OperatorTok">:</text:span><text:span text:style-name="NormalTok"><text:s text:c="1"/></text:span><text:span text:style-name="DataTypeTok">string</text:span><text:span text:style-name="NormalTok"><text:s text:c="1"/>}</text:span><text:span text:style-name="OperatorTok">&gt;</text:span><text:span text:style-name="NormalTok">(</text:span>
</text:p>
      <text:p text:style-name="Preformatted_20_Text">
<text:span text:style-name="NormalTok"><text:s text:c="6"/></text:span><text:span text:style-name="StringTok">"SELECT COUNT(*) as count FROM users"</text:span><text:span text:style-name="OperatorTok">,</text:span>
</text:p>
      <text:p text:style-name="Preformatted_20_Text">
<text:span text:style-name="NormalTok"><text:s text:c="4"/>)</text:span><text:span text:style-name="OperatorTok">;</text:span>
</text:p>
      <text:p text:style-name="Preformatted_20_Text">
<text:span text:style-name="NormalTok"><text:s text:c="4"/></text:span><text:span text:style-name="KeywordTok">const</text:span><text:span text:style-name="NormalTok"><text:s text:c="1"/>activeUsers </text:span><text:span text:style-name="OperatorTok">=</text:span><text:span text:style-name="NormalTok"><text:s text:c="1"/></text:span><text:span text:style-name="PreprocessorTok">parseInt</text:span><text:span text:style-name="NormalTok">(usersResult</text:span><text:span text:style-name="OperatorTok">?.</text:span><text:span text:style-name="AttributeTok">count</text:span><text:span text:style-name="NormalTok"><text:s text:c="1"/></text:span><text:span text:style-name="OperatorTok">||</text:span><text:span text:style-name="NormalTok"><text:s text:c="1"/></text:span><text:span text:style-name="StringTok">"0"</text:span><text:span text:style-name="NormalTok">)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KeywordTok">const</text:span><text:span text:style-name="NormalTok"><text:s text:c="1"/>inventoryResult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queryOne</text:span><text:span text:style-name="OperatorTok">&lt;</text:span><text:span text:style-name="NormalTok">{ total</text:span><text:span text:style-name="OperatorTok">:</text:span><text:span text:style-name="NormalTok"><text:s text:c="1"/></text:span><text:span text:style-name="DataTypeTok">string</text:span><text:span text:style-name="NormalTok"><text:s text:c="1"/>}</text:span><text:span text:style-name="OperatorTok">&gt;</text:span><text:span text:style-name="NormalTok">(</text:span>
</text:p>
      <text:p text:style-name="Preformatted_20_Text">
<text:span text:style-name="NormalTok"><text:s text:c="6"/></text:span><text:span text:style-name="StringTok">"SELECT COALESCE(SUM(copies_owned), 0) as total FROM books"</text:span><text:span text:style-name="OperatorTok">,</text:span>
</text:p>
      <text:p text:style-name="Preformatted_20_Text">
<text:span text:style-name="NormalTok"><text:s text:c="4"/>)</text:span><text:span text:style-name="OperatorTok">;</text:span>
</text:p>
      <text:p text:style-name="Preformatted_20_Text">
<text:span text:style-name="NormalTok"><text:s text:c="4"/></text:span><text:span text:style-name="KeywordTok">const</text:span><text:span text:style-name="NormalTok"><text:s text:c="1"/>totalInventory </text:span><text:span text:style-name="OperatorTok">=</text:span><text:span text:style-name="NormalTok"><text:s text:c="1"/></text:span><text:span text:style-name="PreprocessorTok">parseInt</text:span><text:span text:style-name="NormalTok">(inventoryResult</text:span><text:span text:style-name="OperatorTok">?.</text:span><text:span text:style-name="AttributeTok">total</text:span><text:span text:style-name="NormalTok"><text:s text:c="1"/></text:span><text:span text:style-name="OperatorTok">||</text:span><text:span text:style-name="NormalTok"><text:s text:c="1"/></text:span><text:span text:style-name="StringTok">"0"</text:span><text:span text:style-name="NormalTok">)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KeywordTok">const</text:span><text:span text:style-name="NormalTok"><text:s text:c="1"/>finesResult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queryOne</text:span><text:span text:style-name="OperatorTok">&lt;</text:span><text:span text:style-name="NormalTok">{ total</text:span><text:span text:style-name="OperatorTok">:</text:span><text:span text:style-name="NormalTok"><text:s text:c="1"/></text:span><text:span text:style-name="DataTypeTok">string</text:span><text:span text:style-name="OperatorTok">;</text:span><text:span text:style-name="NormalTok"><text:s text:c="1"/>count</text:span><text:span text:style-name="OperatorTok">:</text:span><text:span text:style-name="NormalTok"><text:s text:c="1"/></text:span><text:span text:style-name="DataTypeTok">string</text:span><text:span text:style-name="NormalTok"><text:s text:c="1"/>}</text:span><text:span text:style-name="OperatorTok">&gt;</text:span><text:span text:style-name="NormalTok">(</text:span>
</text:p>
      <text:p text:style-name="Preformatted_20_Text">
<text:span text:style-name="NormalTok"><text:s text:c="6"/></text:span><text:span text:style-name="VerbatimStringTok">`SELECT</text:span>
</text:p>
      <text:p text:style-name="Preformatted_20_Text">
<text:span text:style-name="VerbatimStringTok"><text:s text:c="8"/>COALESCE(SUM(fine_amount), 0) as total,</text:span>
</text:p>
      <text:p text:style-name="Preformatted_20_Text">
<text:span text:style-name="VerbatimStringTok"><text:s text:c="8"/>COUNT(*) as count</text:span>
</text:p>
      <text:p text:style-name="Preformatted_20_Text">
<text:span text:style-name="VerbatimStringTok"><text:s text:c="7"/>FROM fines</text:span>
</text:p>
      <text:p text:style-name="Preformatted_20_Text">
<text:span text:style-name="VerbatimStringTok"><text:s text:c="7"/>WHERE LOWER(COALESCE(status, 'unpaid')) = 'unpaid'`</text:span><text:span text:style-name="OperatorTok">,</text:span>
</text:p>
      <text:p text:style-name="Preformatted_20_Text">
<text:span text:style-name="NormalTok"><text:s text:c="4"/>)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ControlFlowTok">return</text:span><text:span text:style-name="NormalTok"><text:s text:c="1"/>NextResponse</text:span><text:span text:style-name="OperatorTok">.</text:span><text:span text:style-name="FunctionTok">json</text:span><text:span text:style-name="NormalTok">({</text:span>
</text:p>
      <text:p text:style-name="Preformatted_20_Text">
<text:span text:style-name="NormalTok"><text:s text:c="6"/>stats</text:span><text:span text:style-name="OperatorTok">:</text:span><text:span text:style-name="NormalTok"><text:s text:c="1"/>{</text:span>
</text:p>
      <text:p text:style-name="Preformatted_20_Text">
<text:span text:style-name="NormalTok"><text:s text:c="8"/>activeUsers</text:span><text:span text:style-name="OperatorTok">,</text:span>
</text:p>
      <text:p text:style-name="Preformatted_20_Text">
<text:span text:style-name="NormalTok"><text:s text:c="8"/>totalInventory</text:span><text:span text:style-name="OperatorTok">,</text:span>
</text:p>
      <text:p text:style-name="Preformatted_20_Text">
<text:span text:style-name="NormalTok"><text:s text:c="6"/>}</text:span><text:span text:style-name="OperatorTok">,</text:span>
</text:p>
      <text:p text:style-name="Preformatted_20_Text">
<text:span text:style-name="NormalTok"><text:s text:c="4"/>})</text:span><text:span text:style-name="OperatorTok">;</text:span>
</text:p>
      <text:p text:style-name="Preformatted_20_Text">
<text:span text:style-name="NormalTok"><text:s text:c="2"/>} </text:span><text:span text:style-name="ControlFlowTok">catch</text:span><text:span text:style-name="NormalTok"><text:s text:c="1"/>(error) {</text:span>
</text:p>
      <text:p text:style-name="Preformatted_20_Text">
<text:span text:style-name="NormalTok"><text:s text:c="4"/></text:span><text:span text:style-name="ControlFlowTok">return</text:span><text:span text:style-name="NormalTok"><text:s text:c="1"/>NextResponse</text:span><text:span text:style-name="OperatorTok">.</text:span><text:span text:style-name="FunctionTok">json</text:span><text:span text:style-name="NormalTok">(</text:span>
</text:p>
      <text:p text:style-name="Preformatted_20_Text">
<text:span text:style-name="NormalTok"><text:s text:c="6"/>{ error</text:span><text:span text:style-name="OperatorTok">:</text:span><text:span text:style-name="NormalTok"><text:s text:c="1"/></text:span><text:span text:style-name="StringTok">"Internal server error"</text:span><text:span text:style-name="NormalTok"><text:s text:c="1"/>}</text:span><text:span text:style-name="OperatorTok">,</text:span>
</text:p>
      <text:p text:style-name="Preformatted_20_Text">
<text:span text:style-name="NormalTok"><text:s text:c="6"/>{ status</text:span><text:span text:style-name="OperatorTok">:</text:span><text:span text:style-name="NormalTok"><text:s text:c="1"/></text:span><text:span text:style-name="DecValTok">500</text:span><text:span text:style-name="NormalTok"><text:s text:c="1"/>}</text:span><text:span text:style-name="OperatorTok">,</text:span>
</text:p>
      <text:p text:style-name="Preformatted_20_Text">
<text:span text:style-name="NormalTok"><text:s text:c="4"/>)</text:span><text:span text:style-name="OperatorTok">;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p text:style-name="First_20_paragraph">File: <text:span text:style-name="Source_Text">admin/app/api/books/route.ts</text:span></text:p>
      <text:p text:style-name="Preformatted_20_Text">
<text:span text:style-name="ImportTok">export</text:span><text:span text:style-name="NormalTok"><text:s text:c="1"/></text:span><text:span text:style-name="KeywordTok">async</text:span><text:span text:style-name="NormalTok"><text:s text:c="1"/></text:span><text:span text:style-name="KeywordTok">function</text:span><text:span text:style-name="NormalTok"><text:s text:c="1"/></text:span><text:span text:style-name="FunctionTok">POST</text:span><text:span text:style-name="NormalTok">(request</text:span><text:span text:style-name="OperatorTok">:</text:span><text:span text:style-name="NormalTok"><text:s text:c="1"/>NextRequest) {</text:span>
</text:p>
      <text:p text:style-name="Preformatted_20_Text">
<text:span text:style-name="NormalTok"><text:s text:c="2"/></text:span><text:span text:style-name="KeywordTok">const</text:span><text:span text:style-name="NormalTok"><text:s text:c="1"/>auth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verifyAdmin</text:span><text:span text:style-name="NormalTok">(request)</text:span><text:span text:style-name="OperatorTok">;</text:span>
</text:p>
      <text:p text:style-name="Preformatted_20_Text">
<text:span text:style-name="NormalTok"><text:s text:c="2"/></text:span><text:span text:style-name="ControlFlowTok">if</text:span><text:span text:style-name="NormalTok"><text:s text:c="1"/>(auth</text:span><text:span text:style-name="OperatorTok">.</text:span><text:span text:style-name="AttributeTok">error</text:span><text:span text:style-name="NormalTok">) </text:span><text:span text:style-name="ControlFlowTok">return</text:span><text:span text:style-name="NormalTok"><text:s text:c="1"/>auth</text:span><text:span text:style-name="OperatorTok">.</text:span><text:span text:style-name="AttributeTok">error</text:span><text:span text:style-name="OperatorTok">;</text:span>
</text:p>
      <text:p text:style-name="Preformatted_20_Text">
</text:p>
      <text:p text:style-name="Preformatted_20_Text">
<text:span text:style-name="NormalTok"><text:s text:c="2"/></text:span><text:span text:style-name="ControlFlowTok">try</text:span><text:span text:style-name="NormalTok"><text:s text:c="1"/>{</text:span>
</text:p>
      <text:p text:style-name="Preformatted_20_Text">
<text:span text:style-name="NormalTok"><text:s text:c="4"/></text:span><text:span text:style-name="KeywordTok">const</text:span><text:span text:style-name="NormalTok"><text:s text:c="1"/>body </text:span><text:span text:style-name="OperatorTok">=</text:span><text:span text:style-name="NormalTok"><text:s text:c="1"/></text:span><text:span text:style-name="ControlFlowTok">await</text:span><text:span text:style-name="NormalTok"><text:s text:c="1"/>request</text:span><text:span text:style-name="OperatorTok">.</text:span><text:span text:style-name="FunctionTok">json</text:span><text:span text:style-name="NormalTok">()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ControlFlowTok">if</text:span><text:span text:style-name="NormalTok"><text:s text:c="1"/>(</text:span>
</text:p>
      <text:p text:style-name="Preformatted_20_Text">
<text:span text:style-name="NormalTok"><text:s text:c="6"/></text:span><text:span text:style-name="OperatorTok">!</text:span><text:span text:style-name="NormalTok">body</text:span><text:span text:style-name="OperatorTok">.</text:span><text:span text:style-name="AttributeTok">title</text:span><text:span text:style-name="NormalTok"><text:s text:c="1"/></text:span><text:span text:style-name="OperatorTok">||</text:span>
</text:p>
      <text:p text:style-name="Preformatted_20_Text">
<text:span text:style-name="NormalTok"><text:s text:c="6"/></text:span><text:span text:style-name="KeywordTok">typeof</text:span><text:span text:style-name="NormalTok"><text:s text:c="1"/>body</text:span><text:span text:style-name="OperatorTok">.</text:span><text:span text:style-name="AttributeTok">title</text:span><text:span text:style-name="NormalTok"><text:s text:c="1"/></text:span><text:span text:style-name="OperatorTok">!==</text:span><text:span text:style-name="NormalTok"><text:s text:c="1"/></text:span><text:span text:style-name="StringTok">"string"</text:span><text:span text:style-name="NormalTok"><text:s text:c="1"/></text:span><text:span text:style-name="OperatorTok">||</text:span>
</text:p>
      <text:p text:style-name="Preformatted_20_Text">
<text:span text:style-name="NormalTok"><text:s text:c="6"/>body</text:span><text:span text:style-name="OperatorTok">.</text:span><text:span text:style-name="AttributeTok">title</text:span><text:span text:style-name="OperatorTok">.</text:span><text:span text:style-name="FunctionTok">trim</text:span><text:span text:style-name="NormalTok">()</text:span><text:span text:style-name="OperatorTok">.</text:span><text:span text:style-name="AttributeTok">length</text:span><text:span text:style-name="NormalTok"><text:s text:c="1"/></text:span><text:span text:style-name="OperatorTok">&lt;</text:span><text:span text:style-name="NormalTok"><text:s text:c="1"/></text:span><text:span text:style-name="DecValTok">1</text:span><text:span text:style-name="NormalTok"><text:s text:c="1"/></text:span><text:span text:style-name="OperatorTok">||</text:span>
</text:p>
      <text:p text:style-name="Preformatted_20_Text">
<text:span text:style-name="NormalTok"><text:s text:c="6"/>body</text:span><text:span text:style-name="OperatorTok">.</text:span><text:span text:style-name="AttributeTok">title</text:span><text:span text:style-name="OperatorTok">.</text:span><text:span text:style-name="FunctionTok">trim</text:span><text:span text:style-name="NormalTok">()</text:span><text:span text:style-name="OperatorTok">.</text:span><text:span text:style-name="AttributeTok">length</text:span><text:span text:style-name="NormalTok"><text:s text:c="1"/></text:span><text:span text:style-name="OperatorTok">&gt;</text:span><text:span text:style-name="NormalTok"><text:s text:c="1"/></text:span><text:span text:style-name="DecValTok">500</text:span>
</text:p>
      <text:p text:style-name="Preformatted_20_Text">
<text:span text:style-name="NormalTok"><text:s text:c="4"/>) {</text:span>
</text:p>
      <text:p text:style-name="Preformatted_20_Text">
<text:span text:style-name="NormalTok"><text:s text:c="6"/></text:span><text:span text:style-name="ControlFlowTok">return</text:span><text:span text:style-name="NormalTok"><text:s text:c="1"/>NextResponse</text:span><text:span text:style-name="OperatorTok">.</text:span><text:span text:style-name="FunctionTok">json</text:span><text:span text:style-name="NormalTok">(</text:span>
</text:p>
      <text:p text:style-name="Preformatted_20_Text">
<text:span text:style-name="NormalTok"><text:s text:c="8"/>{ error</text:span><text:span text:style-name="OperatorTok">:</text:span><text:span text:style-name="NormalTok"><text:s text:c="1"/></text:span><text:span text:style-name="StringTok">"Title is required and must be 1-500 characters"</text:span><text:span text:style-name="NormalTok"><text:s text:c="1"/>}</text:span><text:span text:style-name="OperatorTok">,</text:span>
</text:p>
      <text:p text:style-name="Preformatted_20_Text">
<text:span text:style-name="NormalTok"><text:s text:c="8"/>{ status</text:span><text:span text:style-name="OperatorTok">:</text:span><text:span text:style-name="NormalTok"><text:s text:c="1"/></text:span><text:span text:style-name="DecValTok">400</text:span><text:span text:style-name="NormalTok"><text:s text:c="1"/>}</text:span><text:span text:style-name="OperatorTok">,</text:span>
</text:p>
      <text:p text:style-name="Preformatted_20_Text">
<text:span text:style-name="NormalTok"><text:s text:c="6"/>)</text:span><text:span text:style-name="OperatorTok">;</text:span>
</text:p>
      <text:p text:style-name="Preformatted_20_Text">
<text:span text:style-name="NormalTok"><text:s text:c="4"/>}</text:span>
</text:p>
      <text:p text:style-name="Preformatted_20_Text">
</text:p>
      <text:p text:style-name="Preformatted_20_Text">
<text:span text:style-name="NormalTok"><text:s text:c="4"/></text:span><text:span text:style-name="KeywordTok">const</text:span><text:span text:style-name="NormalTok"><text:s text:c="1"/>id </text:span><text:span text:style-name="OperatorTok">=</text:span><text:span text:style-name="NormalTok"><text:s text:c="1"/></text:span><text:span text:style-name="VerbatimStringTok">`b</text:span><text:span text:style-name="SpecialCharTok">${</text:span><text:span text:style-name="BuiltInTok">Math</text:span><text:span text:style-name="OperatorTok">.</text:span><text:span text:style-name="FunctionTok">floor</text:span><text:span text:style-name="NormalTok">(</text:span><text:span text:style-name="DecValTok">100000</text:span><text:span text:style-name="NormalTok"><text:s text:c="1"/></text:span><text:span text:style-name="OperatorTok">+</text:span><text:span text:style-name="NormalTok"><text:s text:c="1"/></text:span><text:span text:style-name="BuiltInTok">Math</text:span><text:span text:style-name="OperatorTok">.</text:span><text:span text:style-name="FunctionTok">random</text:span><text:span text:style-name="NormalTok">() </text:span><text:span text:style-name="OperatorTok">*</text:span><text:span text:style-name="NormalTok"><text:s text:c="1"/></text:span><text:span text:style-name="DecValTok">900000</text:span><text:span text:style-name="NormalTok">)</text:span><text:span text:style-name="SpecialCharTok">}</text:span><text:span text:style-name="VerbatimStringTok">`</text:span><text:span text:style-name="OperatorTok">;</text:span>
</text:p>
      <text:p text:style-name="Preformatted_20_Text">
<text:span text:style-name="NormalTok"><text:s text:c="4"/></text:span><text:span text:style-name="KeywordTok">const</text:span><text:span text:style-name="NormalTok"><text:s text:c="1"/>columns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getBookColumnSet</text:span><text:span text:style-name="NormalTok">()</text:span><text:span text:style-name="OperatorTok">;</text:span>
</text:p>
      <text:p text:style-name="Preformatted_20_Text">
<text:span text:style-name="NormalTok"><text:s text:c="4"/></text:span><text:span text:style-name="KeywordTok">const</text:span><text:span text:style-name="NormalTok"><text:s text:c="1"/>usesAuthorId </text:span><text:span text:style-name="OperatorTok">=</text:span><text:span text:style-name="NormalTok"><text:s text:c="1"/>columns</text:span><text:span text:style-name="OperatorTok">.</text:span><text:span text:style-name="FunctionTok">has</text:span><text:span text:style-name="NormalTok">(</text:span><text:span text:style-name="StringTok">"author_id"</text:span><text:span text:style-name="NormalTok">) </text:span><text:span text:style-name="OperatorTok">&amp;&amp;</text:span><text:span text:style-name="NormalTok"><text:s text:c="1"/></text:span><text:span text:style-name="OperatorTok">!</text:span><text:span text:style-name="NormalTok">columns</text:span><text:span text:style-name="OperatorTok">.</text:span><text:span text:style-name="FunctionTok">has</text:span><text:span text:style-name="NormalTok">(</text:span><text:span text:style-name="StringTok">"author"</text:span><text:span text:style-name="NormalTok">)</text:span><text:span text:style-name="OperatorTok">;</text:span>
</text:p>
      <text:h text:style-name="Heading_20_3" text:outline-level="3"><text:bookmark-start text:name="clear-conclusion-14"/>Clear conclusion<text:bookmark-end text:name="clear-conclusion-14"/></text:h>
      <text:p text:style-name="First_20_paragraph">The admin API is mostly using Transaction Script, not a large service-layer architecture.</text:p>
      <text:h text:style-name="Heading_20_2" text:outline-level="2"><text:bookmark-start text:name="shared-gateway-singleton-like-resource-pattern"/>5.4 Shared Gateway / Singleton-like Resource Pattern<text:bookmark-end text:name="shared-gateway-singleton-like-resource-pattern"/></text:h>
      <text:h text:style-name="Heading_20_3" text:outline-level="3"><text:bookmark-start text:name="what-it-is-15"/>What it is<text:bookmark-end text:name="what-it-is-15"/></text:h>
      <text:p text:style-name="First_20_paragraph">A shared gateway or singleton-like resource pattern centralizes access to a reusable infrastructure object such as a DB pool.</text:p>
      <text:h text:style-name="Heading_20_3" text:outline-level="3"><text:bookmark-start text:name="why-your-code-matches-this-15"/>Why your code matches this<text:bookmark-end text:name="why-your-code-matches-this-15"/></text:h>
      <text:p text:style-name="First_20_paragraph">Your Postgres pool is created once at module level and reused through helper functions like <text:span text:style-name="Source_Text">getClient</text:span>, <text:span text:style-name="Source_Text">query</text:span>, and <text:span text:style-name="Source_Text">queryOne</text:span>.</text:p>
      <text:h text:style-name="Heading_20_3" text:outline-level="3"><text:bookmark-start text:name="code-evidence-14"/>Code evidence<text:bookmark-end text:name="code-evidence-14"/></text:h>
      <text:p text:style-name="First_20_paragraph">File: <text:span text:style-name="Source_Text">admin/lib/database/connection.ts</text:span></text:p>
      <text:p text:style-name="Preformatted_20_Text">
<text:span text:style-name="KeywordTok">const</text:span><text:span text:style-name="NormalTok"><text:s text:c="1"/>{ config</text:span><text:span text:style-name="OperatorTok">:</text:span><text:span text:style-name="NormalTok"><text:s text:c="1"/>poolConfig</text:span><text:span text:style-name="OperatorTok">,</text:span><text:span text:style-name="NormalTok"><text:s text:c="1"/>diagnostics</text:span><text:span text:style-name="OperatorTok">:</text:span><text:span text:style-name="NormalTok"><text:s text:c="1"/>dbDiagnostics } </text:span><text:span text:style-name="OperatorTok">=</text:span><text:span text:style-name="NormalTok"><text:s text:c="1"/></text:span><text:span text:style-name="FunctionTok">resolvePoolConfig</text:span><text:span text:style-name="NormalTok">()</text:span><text:span text:style-name="OperatorTok">;</text:span>
</text:p>
      <text:p text:style-name="Preformatted_20_Text">
</text:p>
      <text:p text:style-name="Preformatted_20_Text">
<text:span text:style-name="KeywordTok">const</text:span><text:span text:style-name="NormalTok"><text:s text:c="1"/>pool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Pool</text:span><text:span text:style-name="NormalTok">({</text:span>
</text:p>
      <text:p text:style-name="Preformatted_20_Text">
<text:span text:style-name="NormalTok"><text:s text:c="2"/></text:span><text:span text:style-name="OperatorTok">...</text:span><text:span text:style-name="NormalTok">poolConfig</text:span><text:span text:style-name="OperatorTok">,</text:span>
</text:p>
      <text:p text:style-name="Preformatted_20_Text">
<text:span text:style-name="NormalTok"><text:s text:c="2"/>max</text:span><text:span text:style-name="OperatorTok">:</text:span><text:span text:style-name="NormalTok"><text:s text:c="1"/></text:span><text:span text:style-name="DecValTok">20</text:span><text:span text:style-name="OperatorTok">,</text:span>
</text:p>
      <text:p text:style-name="Preformatted_20_Text">
<text:span text:style-name="NormalTok"><text:s text:c="2"/>min</text:span><text:span text:style-name="OperatorTok">:</text:span><text:span text:style-name="NormalTok"><text:s text:c="1"/></text:span><text:span text:style-name="DecValTok">2</text:span><text:span text:style-name="OperatorTok">,</text:span>
</text:p>
      <text:p text:style-name="Preformatted_20_Text">
<text:span text:style-name="NormalTok"><text:s text:c="2"/>idleTimeoutMillis</text:span><text:span text:style-name="OperatorTok">:</text:span><text:span text:style-name="NormalTok"><text:s text:c="1"/></text:span><text:span text:style-name="DecValTok">30000</text:span><text:span text:style-name="OperatorTok">,</text:span>
</text:p>
      <text:p text:style-name="Preformatted_20_Text">
<text:span text:style-name="NormalTok"><text:s text:c="2"/>connectionTimeoutMillis</text:span><text:span text:style-name="OperatorTok">:</text:span><text:span text:style-name="NormalTok"><text:s text:c="1"/></text:span><text:span text:style-name="DecValTok">5000</text:span><text:span text:style-name="OperatorTok">,</text:span>
</text:p>
      <text:p text:style-name="Preformatted_20_Text">
<text:span text:style-name="NormalTok">})</text:span><text:span text:style-name="OperatorTok">;</text:span>
</text:p>
      <text:p text:style-name="Preformatted_20_Text">
</text:p>
      <text:p text:style-name="Preformatted_20_Text">
<text:span text:style-name="ImportTok">export</text:span><text:span text:style-name="NormalTok"><text:s text:c="1"/></text:span><text:span text:style-name="KeywordTok">async</text:span><text:span text:style-name="NormalTok"><text:s text:c="1"/></text:span><text:span text:style-name="KeywordTok">function</text:span><text:span text:style-name="NormalTok"><text:s text:c="1"/></text:span><text:span text:style-name="FunctionTok">getClient</text:span><text:span text:style-name="NormalTok">()</text:span><text:span text:style-name="OperatorTok">:</text:span><text:span text:style-name="NormalTok"><text:s text:c="1"/></text:span><text:span text:style-name="BuiltInTok">Promise</text:span><text:span text:style-name="OperatorTok">&lt;</text:span><text:span text:style-name="NormalTok">PoolClient</text:span><text:span text:style-name="OperatorTok">&gt;</text:span><text:span text:style-name="NormalTok"><text:s text:c="1"/>{</text:span>
</text:p>
      <text:p text:style-name="Preformatted_20_Text">
<text:span text:style-name="NormalTok"><text:s text:c="2"/></text:span><text:span text:style-name="ControlFlowTok">try</text:span><text:span text:style-name="NormalTok"><text:s text:c="1"/>{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ControlFlowTok">await</text:span><text:span text:style-name="NormalTok"><text:s text:c="1"/>pool</text:span><text:span text:style-name="OperatorTok">.</text:span><text:span text:style-name="FunctionTok">connect</text:span><text:span text:style-name="NormalTok">()</text:span><text:span text:style-name="OperatorTok">;</text:span>
</text:p>
      <text:p text:style-name="Preformatted_20_Text">
<text:span text:style-name="NormalTok"><text:s text:c="2"/>} </text:span><text:span text:style-name="ControlFlowTok">catch</text:span><text:span text:style-name="NormalTok"><text:s text:c="1"/>(error) {</text:span>
</text:p>
      <text:p text:style-name="Preformatted_20_Text">
<text:span text:style-name="NormalTok"><text:s text:c="4"/></text:span><text:span text:style-name="FunctionTok">logDbOperationError</text:span><text:span text:style-name="NormalTok">(</text:span><text:span text:style-name="StringTok">"connect"</text:span><text:span text:style-name="OperatorTok">,</text:span><text:span text:style-name="NormalTok"><text:s text:c="1"/>error)</text:span><text:span text:style-name="OperatorTok">;</text:span>
</text:p>
      <text:p text:style-name="Preformatted_20_Text">
<text:span text:style-name="NormalTok"><text:s text:c="4"/></text:span><text:span text:style-name="ControlFlowTok">throw</text:span><text:span text:style-name="NormalTok"><text:s text:c="1"/>error</text:span><text:span text:style-name="OperatorTok">;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p text:style-name="Preformatted_20_Text">
</text:p>
      <text:p text:style-name="Preformatted_20_Text">
<text:span text:style-name="ImportTok">export</text:span><text:span text:style-name="NormalTok"><text:s text:c="1"/></text:span><text:span text:style-name="KeywordTok">async</text:span><text:span text:style-name="NormalTok"><text:s text:c="1"/></text:span><text:span text:style-name="KeywordTok">function</text:span><text:span text:style-name="NormalTok"><text:s text:c="1"/></text:span><text:span text:style-name="FunctionTok">query</text:span><text:span text:style-name="OperatorTok">&lt;</text:span><text:span text:style-name="NormalTok">T</text:span><text:span text:style-name="OperatorTok">&gt;</text:span><text:span text:style-name="NormalTok">(text</text:span><text:span text:style-name="OperatorTok">:</text:span><text:span text:style-name="NormalTok"><text:s text:c="1"/></text:span><text:span text:style-name="DataTypeTok">string</text:span><text:span text:style-name="OperatorTok">,</text:span><text:span text:style-name="NormalTok"><text:s text:c="1"/>params</text:span><text:span text:style-name="OperatorTok">?:</text:span><text:span text:style-name="NormalTok"><text:s text:c="1"/></text:span><text:span text:style-name="DataTypeTok">unknown</text:span><text:span text:style-name="NormalTok">[])</text:span><text:span text:style-name="OperatorTok">:</text:span><text:span text:style-name="NormalTok"><text:s text:c="1"/></text:span><text:span text:style-name="BuiltInTok">Promise</text:span><text:span text:style-name="OperatorTok">&lt;</text:span><text:span text:style-name="NormalTok">T[]</text:span><text:span text:style-name="OperatorTok">&gt;</text:span><text:span text:style-name="NormalTok"><text:s text:c="1"/>{</text:span>
</text:p>
      <text:p text:style-name="Preformatted_20_Text">
<text:span text:style-name="NormalTok"><text:s text:c="2"/></text:span><text:span text:style-name="KeywordTok">let</text:span><text:span text:style-name="NormalTok"><text:s text:c="1"/>client</text:span><text:span text:style-name="OperatorTok">:</text:span><text:span text:style-name="NormalTok"><text:s text:c="1"/>PoolClient </text:span><text:span text:style-name="OperatorTok">|</text:span><text:span text:style-name="NormalTok"><text:s text:c="1"/></text:span><text:span text:style-name="DataTypeTok">null</text:span><text:span text:style-name="NormalTok"><text:s text:c="1"/></text:span><text:span text:style-name="OperatorTok">=</text:span><text:span text:style-name="NormalTok"><text:s text:c="1"/></text:span><text:span text:style-name="KeywordTok">null</text:span><text:span text:style-name="OperatorTok">;</text:span>
</text:p>
      <text:p text:style-name="Preformatted_20_Text">
<text:span text:style-name="NormalTok"><text:s text:c="2"/></text:span><text:span text:style-name="ControlFlowTok">try</text:span><text:span text:style-name="NormalTok"><text:s text:c="1"/>{</text:span>
</text:p>
      <text:p text:style-name="Preformatted_20_Text">
<text:span text:style-name="NormalTok"><text:s text:c="4"/>client </text:span><text:span text:style-name="OperatorTok">=</text:span><text:span text:style-name="NormalTok"><text:s text:c="1"/></text:span><text:span text:style-name="ControlFlowTok">await</text:span><text:span text:style-name="NormalTok"><text:s text:c="1"/></text:span><text:span text:style-name="FunctionTok">getClient</text:span><text:span text:style-name="NormalTok">()</text:span><text:span text:style-name="OperatorTok">;</text:span>
</text:p>
      <text:p text:style-name="Preformatted_20_Text">
<text:span text:style-name="NormalTok"><text:s text:c="4"/></text:span><text:span text:style-name="KeywordTok">const</text:span><text:span text:style-name="NormalTok"><text:s text:c="1"/>result </text:span><text:span text:style-name="OperatorTok">=</text:span><text:span text:style-name="NormalTok"><text:s text:c="1"/></text:span><text:span text:style-name="ControlFlowTok">await</text:span><text:span text:style-name="NormalTok"><text:s text:c="1"/>client</text:span><text:span text:style-name="OperatorTok">.</text:span><text:span text:style-name="FunctionTok">query</text:span><text:span text:style-name="NormalTok">(text</text:span><text:span text:style-name="OperatorTok">,</text:span><text:span text:style-name="NormalTok"><text:s text:c="1"/>params)</text:span><text:span text:style-name="OperatorTok">;</text:span>
</text:p>
      <text:p text:style-name="Preformatted_20_Text">
<text:span text:style-name="NormalTok"><text:s text:c="4"/></text:span><text:span text:style-name="ControlFlowTok">return</text:span><text:span text:style-name="NormalTok"><text:s text:c="1"/>result</text:span><text:span text:style-name="OperatorTok">.</text:span><text:span text:style-name="AttributeTok">rows</text:span><text:span text:style-name="NormalTok"><text:s text:c="1"/></text:span><text:span text:style-name="ImportTok">as</text:span><text:span text:style-name="NormalTok"><text:s text:c="1"/>T[]</text:span><text:span text:style-name="OperatorTok">;</text:span>
</text:p>
      <text:p text:style-name="Preformatted_20_Text">
<text:span text:style-name="NormalTok"><text:s text:c="2"/>} </text:span><text:span text:style-name="ControlFlowTok">finally</text:span><text:span text:style-name="NormalTok"><text:s text:c="1"/>{</text:span>
</text:p>
      <text:p text:style-name="Preformatted_20_Text">
<text:span text:style-name="NormalTok"><text:s text:c="4"/>client</text:span><text:span text:style-name="OperatorTok">?.</text:span><text:span text:style-name="FunctionTok">release</text:span><text:span text:style-name="NormalTok">()</text:span><text:span text:style-name="OperatorTok">;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h text:style-name="Heading_20_3" text:outline-level="3"><text:bookmark-start text:name="clear-conclusion-15"/>Clear conclusion<text:bookmark-end text:name="clear-conclusion-15"/></text:h>
      <text:p text:style-name="First_20_paragraph">This behaves like a singleton/shared gateway for database access.</text:p>
      <text:h text:style-name="Heading_20_2" text:outline-level="2"><text:bookmark-start text:name="simple-factory-pattern"/>5.5 Simple Factory Pattern<text:bookmark-end text:name="simple-factory-pattern"/></text:h>
      <text:h text:style-name="Heading_20_3" text:outline-level="3"><text:bookmark-start text:name="what-it-is-16"/>What it is<text:bookmark-end text:name="what-it-is-16"/></text:h>
      <text:p text:style-name="First_20_paragraph">A factory creates configured objects so callers do not need to know construction details.</text:p>
      <text:h text:style-name="Heading_20_3" text:outline-level="3"><text:bookmark-start text:name="why-your-code-matches-this-16"/>Why your code matches this<text:bookmark-end text:name="why-your-code-matches-this-16"/></text:h>
      <text:p text:style-name="First_20_paragraph">Your storage client is created through a helper function that takes config and returns a fully configured <text:span text:style-name="Source_Text">S3Client</text:span>.</text:p>
      <text:h text:style-name="Heading_20_3" text:outline-level="3"><text:bookmark-start text:name="code-evidence-15"/>Code evidence<text:bookmark-end text:name="code-evidence-15"/></text:h>
      <text:p text:style-name="First_20_paragraph">File: <text:span text:style-name="Source_Text">admin/lib/storage/client.ts</text:span></text:p>
      <text:p text:style-name="Preformatted_20_Text">
<text:span text:style-name="ImportTok">export</text:span><text:span text:style-name="NormalTok"><text:s text:c="1"/></text:span><text:span text:style-name="KeywordTok">function</text:span><text:span text:style-name="NormalTok"><text:s text:c="1"/></text:span><text:span text:style-name="FunctionTok">createStorageClient</text:span><text:span text:style-name="NormalTok">(config</text:span><text:span text:style-name="OperatorTok">:</text:span><text:span text:style-name="NormalTok"><text:s text:c="1"/>StorageConfig)</text:span><text:span text:style-name="OperatorTok">:</text:span><text:span text:style-name="NormalTok"><text:s text:c="1"/>S3Client {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KeywordTok">new</text:span><text:span text:style-name="NormalTok"><text:s text:c="1"/></text:span><text:span text:style-name="FunctionTok">S3Client</text:span><text:span text:style-name="NormalTok">({</text:span>
</text:p>
      <text:p text:style-name="Preformatted_20_Text">
<text:span text:style-name="NormalTok"><text:s text:c="4"/>region</text:span><text:span text:style-name="OperatorTok">:</text:span><text:span text:style-name="NormalTok"><text:s text:c="1"/>config</text:span><text:span text:style-name="OperatorTok">.</text:span><text:span text:style-name="AttributeTok">region</text:span><text:span text:style-name="OperatorTok">,</text:span>
</text:p>
      <text:p text:style-name="Preformatted_20_Text">
<text:span text:style-name="NormalTok"><text:s text:c="4"/>endpoint</text:span><text:span text:style-name="OperatorTok">:</text:span><text:span text:style-name="NormalTok"><text:s text:c="1"/>config</text:span><text:span text:style-name="OperatorTok">.</text:span><text:span text:style-name="AttributeTok">s3Endpoint</text:span><text:span text:style-name="OperatorTok">,</text:span>
</text:p>
      <text:p text:style-name="Preformatted_20_Text">
<text:span text:style-name="NormalTok"><text:s text:c="4"/>credentials</text:span><text:span text:style-name="OperatorTok">:</text:span><text:span text:style-name="NormalTok"><text:s text:c="1"/>{</text:span>
</text:p>
      <text:p text:style-name="Preformatted_20_Text">
<text:span text:style-name="NormalTok"><text:s text:c="6"/>accessKeyId</text:span><text:span text:style-name="OperatorTok">:</text:span><text:span text:style-name="NormalTok"><text:s text:c="1"/>config</text:span><text:span text:style-name="OperatorTok">.</text:span><text:span text:style-name="AttributeTok">accessKeyId</text:span><text:span text:style-name="OperatorTok">,</text:span>
</text:p>
      <text:p text:style-name="Preformatted_20_Text">
<text:span text:style-name="NormalTok"><text:s text:c="6"/>secretAccessKey</text:span><text:span text:style-name="OperatorTok">:</text:span><text:span text:style-name="NormalTok"><text:s text:c="1"/>config</text:span><text:span text:style-name="OperatorTok">.</text:span><text:span text:style-name="AttributeTok">secretAccessKey</text:span><text:span text:style-name="OperatorTok">,</text:span>
</text:p>
      <text:p text:style-name="Preformatted_20_Text">
<text:span text:style-name="NormalTok"><text:s text:c="4"/>}</text:span><text:span text:style-name="OperatorTok">,</text:span>
</text:p>
      <text:p text:style-name="Preformatted_20_Text">
<text:span text:style-name="NormalTok"><text:s text:c="4"/>forcePathStyle</text:span><text:span text:style-name="OperatorTok">:</text:span><text:span text:style-name="NormalTok"><text:s text:c="1"/></text:span><text:span text:style-name="KeywordTok">true</text:span><text:span text:style-name="OperatorTok">,</text:span>
</text:p>
      <text:p text:style-name="Preformatted_20_Text">
<text:span text:style-name="NormalTok"><text:s text:c="2"/>})</text:span><text:span text:style-name="OperatorTok">;</text:span>
</text:p>
      <text:p text:style-name="Preformatted_20_Text">
<text:span text:style-name="NormalTok">}</text:span>
</text:p>
      <text:h text:style-name="Heading_20_3" text:outline-level="3"><text:bookmark-start text:name="clear-conclusion-16"/>Clear conclusion<text:bookmark-end text:name="clear-conclusion-16"/></text:h>
      <text:p text:style-name="First_20_paragraph">This is a simple and valid factory pattern.</text:p>
      <text:h text:style-name="Heading_20_2" text:outline-level="2"><text:bookmark-start text:name="cross-cutting-patterns"/>6. Cross-Cutting Patterns<text:bookmark-end text:name="cross-cutting-patterns"/></text:h>
      <text:h text:style-name="Heading_20_2" text:outline-level="2"><text:bookmark-start text:name="layered-architecture"/>6.1 Layered Architecture<text:bookmark-end text:name="layered-architecture"/></text:h>
      <text:h text:style-name="Heading_20_3" text:outline-level="3"><text:bookmark-start text:name="why-it-is-present"/>Why it is present<text:bookmark-end text:name="why-it-is-present"/></text:h>
      <text:p text:style-name="First_20_paragraph">Across the repo, your code is separated into layers:</text:p>
      <text:list text:style-name="L14">
        <text:list-item>
          <text:p text:style-name="P90">UI layer</text:p>
        </text:list-item>
        <text:list-item>
          <text:p text:style-name="P90">state / orchestration layer</text:p>
        </text:list-item>
        <text:list-item>
          <text:p text:style-name="P90">data access layer</text:p>
        </text:list-item>
        <text:list-item>
          <text:p text:style-name="P90">service / infrastructure layer</text:p>
        </text:list-item>
      </text:list>
      <text:h text:style-name="Heading_20_3" text:outline-level="3"><text:bookmark-start text:name="example"/>Example<text:bookmark-end text:name="example"/></text:h>
      <text:p text:style-name="P91">client:</text:p>
      <text:p text:style-name="P92"><text:s text:c="2"/>views -&gt; viewmodels -&gt; repositories -&gt; services</text:p>
      <text:p text:style-name="P93"/>
      <text:p text:style-name="P94">server:</text:p>
      <text:p text:style-name="P95"><text:s text:c="2"/>app_factory -&gt; routers -&gt; dependencies -&gt; models/schemas -&gt; db</text:p>
      <text:p text:style-name="P96"/>
      <text:p text:style-name="P97">admin:</text:p>
      <text:p text:style-name="P98"><text:s text:c="2"/>layouts/components -&gt; route handlers -&gt; db/auth/storage helpers</text:p>
      <text:h text:style-name="Heading_20_3" text:outline-level="3"><text:bookmark-start text:name="clear-conclusion-17"/>Clear conclusion<text:bookmark-end text:name="clear-conclusion-17"/></text:h>
      <text:p text:style-name="First_20_paragraph">This project is strongly layered even though each application uses different frameworks.</text:p>
      <text:h text:style-name="Heading_20_2" text:outline-level="2"><text:bookmark-start text:name="feature-based-modularity"/>6.2 Feature-Based Modularity<text:bookmark-end text:name="feature-based-modularity"/></text:h>
      <text:h text:style-name="Heading_20_3" text:outline-level="3"><text:bookmark-start text:name="why-it-is-present-1"/>Why it is present<text:bookmark-end text:name="why-it-is-present-1"/></text:h>
      <text:p text:style-name="First_20_paragraph">The client is grouped by feature, and the backend/admin are grouped by domain.</text:p>
      <text:p text:style-name="Text_20_body">Examples:</text:p>
      <text:list text:style-name="L15">
        <text:list-item>
          <text:p text:style-name="P99"><text:span text:style-name="Source_Text">home</text:span>, <text:span text:style-name="Source_Text">search</text:span>, <text:span text:style-name="Source_Text">profile</text:span>, <text:span text:style-name="Source_Text">borrowed</text:span>, <text:span text:style-name="Source_Text">wishlist</text:span></text:p>
        </text:list-item>
        <text:list-item>
          <text:p text:style-name="P99"><text:span text:style-name="Source_Text">books</text:span>, <text:span text:style-name="Source_Text">users</text:span>, <text:span text:style-name="Source_Text">loans</text:span>, <text:span text:style-name="Source_Text">favorites</text:span>, <text:span text:style-name="Source_Text">settings</text:span></text:p>
        </text:list-item>
      </text:list>
      <text:h text:style-name="Heading_20_3" text:outline-level="3"><text:bookmark-start text:name="clear-conclusion-18"/>Clear conclusion<text:bookmark-end text:name="clear-conclusion-18"/></text:h>
      <text:p text:style-name="First_20_paragraph">This is good modular decomposition and helps maintainability.</text:p>
      <text:h text:style-name="Heading_20_2" text:outline-level="2"><text:bookmark-start text:name="patterns-that-are-partial-or-lightly-used"/>7. Patterns That Are Partial or Lightly Used<text:bookmark-end text:name="patterns-that-are-partial-or-lightly-used"/></text:h>
      <text:p text:style-name="First_20_paragraph">These patterns are present, but not in a heavy textbook way:</text:p>
      <text:h text:style-name="Heading_20_3" text:outline-level="3"><text:bookmark-start text:name="facade"/>Facade<text:bookmark-end text:name="facade"/></text:h>
      <text:list text:style-name="L16">
        <text:list-item>
          <text:p text:style-name="P100">Present in client service wrappers such as <text:span text:style-name="Source_Text">AuthenticatedHttpClient</text:span></text:p>
        </text:list-item>
        <text:list-item>
          <text:p text:style-name="P100">Present in some helper modules that simplify infrastructure access</text:p>
        </text:list-item>
      </text:list>
      <text:h text:style-name="Heading_20_3" text:outline-level="3"><text:bookmark-start text:name="singleton"/>Singleton<text:bookmark-end text:name="singleton"/></text:h>
      <text:list text:style-name="L17">
        <text:list-item>
          <text:p text:style-name="P101">Not used as a formal GoF Singleton class</text:p>
        </text:list-item>
        <text:list-item>
          <text:p text:style-name="P101">But effectively present as shared module-level instances like the Postgres pool</text:p>
        </text:list-item>
      </text:list>
      <text:h text:style-name="Heading_20_3" text:outline-level="3"><text:bookmark-start text:name="composition"/>Composition<text:bookmark-end text:name="composition"/></text:h>
      <text:list text:style-name="L18">
        <text:list-item>
          <text:p text:style-name="P102">Strongly present in UI layout building</text:p>
        </text:list-item>
        <text:list-item>
          <text:p text:style-name="P102">Especially in Flutter widgets and Next.js layouts/components</text:p>
        </text:list-item>
      </text:list>
      <text:h text:style-name="Heading_20_3" text:outline-level="3"><text:bookmark-start text:name="lifecycle-hooks"/>Lifecycle hooks<text:bookmark-end text:name="lifecycle-hooks"/></text:h>
      <text:list text:style-name="L19">
        <text:list-item>
          <text:p text:style-name="P103">Present in FastAPI lifespan startup logic</text:p>
        </text:list-item>
        <text:list-item>
          <text:p text:style-name="P103">Also present in React <text:span text:style-name="Source_Text">useEffect</text:span> session hydration</text:p>
        </text:list-item>
      </text:list>
      <text:h text:style-name="Heading_20_2" text:outline-level="2"><text:bookmark-start text:name="patterns-that-i-do-not-clearly-see"/>8. Patterns That I Do Not Clearly See<text:bookmark-end text:name="patterns-that-i-do-not-clearly-see"/></text:h>
      <text:p text:style-name="First_20_paragraph">I do <text:span text:style-name="T1">not</text:span> see strong evidence of these as formal project-wide patterns:</text:p>
      <text:list text:style-name="L20">
        <text:list-item>
          <text:p text:style-name="P104">Builder pattern</text:p>
        </text:list-item>
        <text:list-item>
          <text:p text:style-name="P104">Abstract Factory</text:p>
        </text:list-item>
        <text:list-item>
          <text:p text:style-name="P104">Strategy pattern as interchangeable classes/objects</text:p>
        </text:list-item>
        <text:list-item>
          <text:p text:style-name="P104">Command pattern</text:p>
        </text:list-item>
        <text:list-item>
          <text:p text:style-name="P104">Decorator pattern as explicit wrappers over behavior objects</text:p>
        </text:list-item>
        <text:list-item>
          <text:p text:style-name="P104">State pattern as explicit polymorphic state classes</text:p>
        </text:list-item>
        <text:list-item>
          <text:p text:style-name="P104">Adapter pattern as a major architectural style</text:p>
        </text:list-item>
      </text:list>
      <text:p text:style-name="First_20_paragraph">Some logic may look similar in small places, but not strongly enough to call them established patterns in this codebase.</text:p>
      <text:h text:style-name="Heading_20_2" text:outline-level="2"><text:bookmark-start text:name="final-pattern-list"/>9. Final Pattern List<text:bookmark-end text:name="final-pattern-list"/></text:h>
      <text:p text:style-name="First_20_paragraph">Below is the clean final list of design patterns used in your project.</text:p>
      <text:h text:style-name="Heading_20_3" text:outline-level="3"><text:bookmark-start text:name="strongly-used"/>Strongly used<text:bookmark-end text:name="strongly-used"/></text:h>
      <text:list text:style-name="L21">
        <text:list-item>
          <text:p text:style-name="P105">MVVM / ViewModel pattern</text:p>
        </text:list-item>
        <text:list-item>
          <text:p text:style-name="P105">Repository pattern</text:p>
        </text:list-item>
        <text:list-item>
          <text:p text:style-name="P105">Observer / reactive state pattern</text:p>
        </text:list-item>
        <text:list-item>
          <text:p text:style-name="P105">Single source of truth / centralized store</text:p>
        </text:list-item>
        <text:list-item>
          <text:p text:style-name="P105">Dependency Injection</text:p>
        </text:list-item>
        <text:list-item>
          <text:p text:style-name="P105">Application Factory pattern</text:p>
        </text:list-item>
        <text:list-item>
          <text:p text:style-name="P105">Router / Controller pattern</text:p>
        </text:list-item>
        <text:list-item>
          <text:p text:style-name="P105">ORM + DTO / Data Mapper style separation</text:p>
        </text:list-item>
        <text:list-item>
          <text:p text:style-name="P105">Transaction Script pattern</text:p>
        </text:list-item>
        <text:list-item>
          <text:p text:style-name="P105">Layered architecture</text:p>
        </text:list-item>
        <text:list-item>
          <text:p text:style-name="P105">Feature-based modular architecture</text:p>
        </text:list-item>
      </text:list>
      <text:h text:style-name="Heading_20_3" text:outline-level="3"><text:bookmark-start text:name="also-present"/>Also present<text:bookmark-end text:name="also-present"/></text:h>
      <text:list text:style-name="L22">
        <text:list-item>
          <text:p text:style-name="P106">Facade / wrapper pattern</text:p>
        </text:list-item>
        <text:list-item>
          <text:p text:style-name="P106">Middleware pipeline pattern</text:p>
        </text:list-item>
        <text:list-item>
          <text:p text:style-name="P106">Application lifecycle / lifespan hook pattern</text:p>
        </text:list-item>
        <text:list-item>
          <text:p text:style-name="P106">React Context + Provider pattern</text:p>
        </text:list-item>
        <text:list-item>
          <text:p text:style-name="P106">Layout composition pattern</text:p>
        </text:list-item>
        <text:list-item>
          <text:p text:style-name="P106">Shared gateway / singleton-like resource pattern</text:p>
        </text:list-item>
        <text:list-item>
          <text:p text:style-name="P106">Simple Factory pattern</text:p>
        </text:list-item>
      </text:list>
      <text:h text:style-name="Heading_20_2" text:outline-level="2"><text:bookmark-start text:name="final-verdict"/>10. Final Verdict<text:bookmark-end text:name="final-verdict"/></text:h>
      <text:p text:style-name="First_20_paragraph">Your project is architecturally stronger than a basic CRUD app.</text:p>
      <text:p text:style-name="Text_20_body">The client is the most pattern-rich part of the system, especially because it combines:</text:p>
      <text:list text:style-name="L23">
        <text:list-item>
          <text:p text:style-name="P107">MVVM</text:p>
        </text:list-item>
        <text:list-item>
          <text:p text:style-name="P107">repositories</text:p>
        </text:list-item>
        <text:list-item>
          <text:p text:style-name="P107">Riverpod reactive state</text:p>
        </text:list-item>
        <text:list-item>
          <text:p text:style-name="P107">centralized notifiers</text:p>
        </text:list-item>
      </text:list>
      <text:p text:style-name="First_20_paragraph">The backend is cleanly structured around:</text:p>
      <text:list text:style-name="L24">
        <text:list-item>
          <text:p text:style-name="P108">application factory</text:p>
        </text:list-item>
        <text:list-item>
          <text:p text:style-name="P108">routers</text:p>
        </text:list-item>
        <text:list-item>
          <text:p text:style-name="P108">dependency injection</text:p>
        </text:list-item>
        <text:list-item>
          <text:p text:style-name="P108">schema/model separation</text:p>
        </text:list-item>
        <text:list-item>
          <text:p text:style-name="P108">middleware</text:p>
        </text:list-item>
      </text:list>
      <text:p text:style-name="First_20_paragraph">The admin app is lighter architecturally, but it still clearly uses:</text:p>
      <text:list text:style-name="L25">
        <text:list-item>
          <text:p text:style-name="P109">React Context Provider</text:p>
        </text:list-item>
        <text:list-item>
          <text:p text:style-name="P109">shared layout composition</text:p>
        </text:list-item>
        <text:list-item>
          <text:p text:style-name="P109">transaction-script route handlers</text:p>
        </text:list-item>
        <text:list-item>
          <text:p text:style-name="P109">shared DB gateway</text:p>
        </text:list-item>
        <text:list-item>
          <text:p text:style-name="P109">simple client factories</text:p>
        </text:list-item>
      </text:list>
      <text:p text:style-name="First_20_paragraph">If I had to summarize your project in one sentence:</text:p>
      <text:p text:style-name="P110">This codebase mainly uses a layered, feature-based architecture with MVVM and Repository on the Flutter side, and Factory + Router + Dependency Injection on the backend sid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/>
    <dc:description/>
    <dc:subject/>
    <meta:keyword/>
    <meta:initial-creator/>
    <dc:creator/>
    <meta:creation-date>2026-04-01T19:45:22Z</meta:creation-date>
    <dc:date>2026-04-01T19:45:22Z</dc:date>
  </office:meta>
</office:document-meta>
</file>